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9cm"/>
    </style:style>
    <style:style style:name="co2" style:family="table-column">
      <style:table-column-properties fo:break-before="auto" style:column-width="5.644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2.999cm"/>
    </style:style>
    <style:style style:name="co5" style:family="table-column">
      <style:table-column-properties fo:break-before="auto" style:column-width="3.951cm"/>
    </style:style>
    <style:style style:name="co6" style:family="table-column">
      <style:table-column-properties fo:break-before="auto" style:column-width="6.526cm"/>
    </style:style>
    <style:style style:name="co7" style:family="table-column">
      <style:table-column-properties fo:break-before="auto" style:column-width="5.292cm"/>
    </style:style>
    <style:style style:name="co8" style:family="table-column">
      <style:table-column-properties fo:break-before="auto" style:column-width="6.879cm"/>
    </style:style>
    <style:style style:name="co9" style:family="table-column">
      <style:table-column-properties fo:break-before="auto" style:column-width="2.533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3.485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5.821cm"/>
    </style:style>
    <style:style style:name="co16" style:family="table-column">
      <style:table-column-properties fo:break-before="auto" style:column-width="18.494cm"/>
    </style:style>
    <style:style style:name="co17" style:family="table-column">
      <style:table-column-properties fo:break-before="auto" style:column-width="3.568cm"/>
    </style:style>
    <style:style style:name="co18" style:family="table-column">
      <style:table-column-properties fo:break-before="auto" style:column-width="3.35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7.761cm"/>
    </style:style>
    <style:style style:name="co21" style:family="table-column">
      <style:table-column-properties fo:break-before="auto" style:column-width="2.117cm"/>
    </style:style>
    <style:style style:name="co22" style:family="table-column">
      <style:table-column-properties fo:break-before="auto" style:column-width="14.817cm"/>
    </style:style>
    <style:style style:name="co23" style:family="table-column">
      <style:table-column-properties fo:break-before="auto" style:column-width="8.114cm"/>
    </style:style>
    <style:style style:name="co24" style:family="table-column">
      <style:table-column-properties fo:break-before="auto" style:column-width="21.872cm"/>
    </style:style>
    <style:style style:name="co25" style:family="table-column">
      <style:table-column-properties fo:break-before="auto" style:column-width="2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1f4e79" style:cell-protect="protected" style:print-content="true" style:text-align-source="value-type" style:repeat-content="false" fo:wrap-option="wrap" style:shrink-to-fit="false" style:vertical-align="middle" loext:vertical-justify="auto"/>
      <style:paragraph-properties css3t:text-justify="auto"/>
      <style:text-properties fo:color="#ffffff" fo:font-size="10pt" fo:font-style="normal" fo:font-weight="bold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wrap" style:shrink-to-fit="false" style:vertical-align="top" loext:vertical-justify="auto"/>
      <style:paragraph-properties css3t:text-justify="auto"/>
      <style:text-properties fo:color="#000000" fo:font-size="10pt" fo:font-style="normal" fo:font-weight="normal"/>
    </style:style>
    <style:style style:name="ce22" style:family="table-cell" style:parent-style-name="Default">
      <style:table-cell-properties fo:background-color="#c6efce" style:cell-protect="protected" style:print-content="true" style:text-align-source="fix" style:repeat-content="false" fo:wrap-option="no-wrap" style:shrink-to-fit="false" style:vertical-align="top" loext:vertical-justify="auto"/>
      <style:paragraph-properties fo:text-align="center" css3t:text-justify="auto"/>
      <style:text-properties fo:color="#000000" fo:font-size="10pt" fo:font-style="normal" fo:font-weight="bold"/>
    </style:style>
    <style:style style:name="ce23" style:family="table-cell" style:parent-style-name="Default">
      <style:table-cell-properties fo:background-color="#ffeb9c" style:cell-protect="protected" style:print-content="true" style:text-align-source="fix" style:repeat-content="false" fo:wrap-option="no-wrap" style:shrink-to-fit="false" style:vertical-align="top" loext:vertical-justify="auto"/>
      <style:paragraph-properties fo:text-align="center" css3t:text-justify="auto"/>
      <style:text-properties fo:color="#000000" fo:font-size="10pt" fo:font-style="normal" fo:font-weight="normal"/>
    </style:style>
    <style:style style:name="ce24" style:family="table-cell" style:parent-style-name="Default">
      <style:table-cell-properties fo:background-color="#ffc7ce" style:cell-protect="protected" style:print-content="true" style:text-align-source="fix" style:repeat-content="false" fo:wrap-option="no-wrap" style:shrink-to-fit="false" style:vertical-align="top" loext:vertical-justify="auto"/>
      <style:paragraph-properties fo:text-align="center" css3t:text-justify="auto"/>
      <style:text-properties fo:color="#000000" fo:font-size="10pt" fo:font-style="normal" fo:font-weight="normal"/>
    </style:style>
    <style:style style:name="ce2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1f4e79" fo:font-size="14pt" fo:font-style="normal" fo:font-weight="bold"/>
    </style:style>
    <style:style style:name="ce29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1f4e79" fo:font-size="11pt" fo:font-style="normal" fo:font-weight="bold"/>
    </style:style>
    <style:style style:name="ce11" style:family="table-cell" style:parent-style-name="Default">
      <style:table-cell-properties fo:background-color="#1f4e79" style:cell-protect="protected" style:print-content="true" style:text-align-source="value-type" style:repeat-content="false" fo:wrap-option="wrap" style:shrink-to-fit="false" style:vertical-align="middle" loext:vertical-justify="auto"/>
      <style:paragraph-properties css3t:text-justify="auto"/>
      <style:text-properties fo:color="#ffffff" fo:font-size="10pt" fo:font-style="normal" fo:font-weight="bold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wrap" style:shrink-to-fit="false" style:vertical-align="top" loext:vertical-justify="auto"/>
      <style:paragraph-properties css3t:text-justify="auto"/>
      <style:text-properties fo:color="#000000" fo:font-size="10pt" fo:font-style="normal" fo:font-weight="normal"/>
    </style:style>
    <style:style style:name="ce13" style:family="table-cell" style:parent-style-name="Default">
      <style:table-cell-properties fo:background-color="#c6efce" style:cell-protect="protected" style:print-content="true" style:text-align-source="fix" style:repeat-content="false" fo:wrap-option="no-wrap" style:shrink-to-fit="false" style:vertical-align="top" loext:vertical-justify="auto"/>
      <style:paragraph-properties fo:text-align="center" css3t:text-justify="auto"/>
      <style:text-properties fo:color="#000000" fo:font-size="10pt" fo:font-style="normal" fo:font-weight="bold"/>
    </style:style>
    <style:style style:name="ce14" style:family="table-cell" style:parent-style-name="Default">
      <style:table-cell-properties fo:background-color="#ffeb9c" style:cell-protect="protected" style:print-content="true" style:text-align-source="fix" style:repeat-content="false" fo:wrap-option="no-wrap" style:shrink-to-fit="false" style:vertical-align="top" loext:vertical-justify="auto"/>
      <style:paragraph-properties fo:text-align="center" css3t:text-justify="auto"/>
      <style:text-properties fo:color="#000000" fo:font-size="10pt" fo:font-style="normal" fo:font-weight="normal"/>
    </style:style>
    <style:style style:name="ce15" style:family="table-cell" style:parent-style-name="Default">
      <style:table-cell-properties fo:background-color="#ffc7ce" style:cell-protect="protected" style:print-content="true" style:text-align-source="fix" style:repeat-content="false" fo:wrap-option="no-wrap" style:shrink-to-fit="false" style:vertical-align="top" loext:vertical-justify="auto"/>
      <style:paragraph-properties fo:text-align="center" css3t:text-justify="auto"/>
      <style:text-properties fo:color="#000000" fo:font-size="10pt" fo:font-style="normal" fo:font-weight="normal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1f4e79" fo:font-size="14pt" fo:font-style="normal" fo:font-weight="bold"/>
    </style:style>
    <style:style style:name="ce30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1f4e79" fo:font-size="11pt" fo:font-style="normal" fo:font-weight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LEADS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4"/>
        <table:table-column table:style-name="co15" table:default-cell-style-name="ce12"/>
        <table:table-column table:style-name="co16" table:default-cell-style-name="ce12"/>
        <table:table-column table:style-name="co17" table:default-cell-style-name="ce16"/>
        <table:table-column table:style-name="co18" table:default-cell-style-name="ce12"/>
        <table:table-column table:style-name="co19" table:default-cell-style-name="ce12"/>
        <table:table-column table:style-name="co19" table:number-columns-repeated="16365"/>
        <table:table-row table:style-name="ro1">
          <table:table-cell table:style-name="ce11" office:value-type="string" calcext:value-type="string">
            <text:p>Rank</text:p>
          </table:table-cell>
          <table:table-cell table:style-name="ce11" office:value-type="string" calcext:value-type="string">
            <text:p>Empresa</text:p>
          </table:table-cell>
          <table:table-cell table:style-name="ce11" office:value-type="string" calcext:value-type="string">
            <text:p>Segmento</text:p>
          </table:table-cell>
          <table:table-cell table:style-name="ce11" office:value-type="string" calcext:value-type="string">
            <text:p>Cidade</text:p>
          </table:table-cell>
          <table:table-cell table:style-name="ce11" office:value-type="string" calcext:value-type="string">
            <text:p>CNPJ</text:p>
          </table:table-cell>
          <table:table-cell table:style-name="ce11" office:value-type="string" calcext:value-type="string">
            <text:p>Endereço / Contato</text:p>
          </table:table-cell>
          <table:table-cell table:style-name="ce11" office:value-type="string" calcext:value-type="string">
            <text:p>O que produz</text:p>
          </table:table-cell>
          <table:table-cell table:style-name="ce11" office:value-type="string" calcext:value-type="string">
            <text:p>Oportunidade para sua CNC</text:p>
          </table:table-cell>
          <table:table-cell table:style-name="ce11" office:value-type="string" calcext:value-type="string">
            <text:p>Fit (40)</text:p>
          </table:table-cell>
          <table:table-cell table:style-name="ce11" office:value-type="string" calcext:value-type="string">
            <text:p>Recorr. (25)</text:p>
          </table:table-cell>
          <table:table-cell table:style-name="ce11" office:value-type="string" calcext:value-type="string">
            <text:p>Acesso (20)</text:p>
          </table:table-cell>
          <table:table-cell table:style-name="ce11" office:value-type="string" calcext:value-type="string">
            <text:p>Prox. (15)</text:p>
          </table:table-cell>
          <table:table-cell table:style-name="ce11" office:value-type="string" calcext:value-type="string">
            <text:p>Score</text:p>
          </table:table-cell>
          <table:table-cell table:style-name="ce11" office:value-type="string" calcext:value-type="string">
            <text:p>Classe</text:p>
          </table:table-cell>
          <table:table-cell table:style-name="ce11" office:value-type="string" calcext:value-type="string">
            <text:p>Modelo de prospecção</text:p>
          </table:table-cell>
          <table:table-cell table:style-name="ce11" office:value-type="string" calcext:value-type="string">
            <text:p>Gancho de abordagem</text:p>
          </table:table-cell>
          <table:table-cell table:style-name="ce11" office:value-type="string" calcext:value-type="string">
            <text:p>Telefone 1</text:p>
          </table:table-cell>
          <table:table-cell table:style-name="ce11" office:value-type="string" calcext:value-type="string">
            <text:p>Telefone 2</text:p>
          </table:table-cell>
          <table:table-cell table:style-name="ce11" table:number-columns-repeated="1636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diplásticos Injetados Com. e Ind.</text:p>
          </table:table-cell>
          <table:table-cell office:value-type="string" calcext:value-type="string">
            <text:p>Transformação plástica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33.628.939/0001-54</text:p>
          </table:table-cell>
          <table:table-cell office:value-type="string" calcext:value-type="string">
            <text:p>Av. Farroupilhas 438, N. Sra. das Graças</text:p>
          </table:table-cell>
          <table:table-cell office:value-type="string" calcext:value-type="string">
            <text:p>Injeção de artefatos de uso pessoal e doméstico</text:p>
          </table:table-cell>
          <table:table-cell office:value-type="string" calcext:value-type="string">
            <text:p>Moldes de injeção em alumínio, reparo e ajuste de moldes, postiços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Visita técnica + amostra usinada</text:p>
          </table:table-cell>
          <table:table-cell office:value-type="string" calcext:value-type="string">
            <text:p>Reparo de molde com prazo curto e molde-piloto em alumínio para novos SKUs</text:p>
          </table:table-cell>
          <table:table-cell office:value-type="string" calcext:value-type="string">
            <text:p>(34) 3231 8520 </text:p>
          </table:table-cell>
          <table:table-cell table:number-columns-repeated="2"/>
          <table:table-cell table:style-name="ce12" table:number-columns-repeated="1636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assouras Mendonça</text:p>
          </table:table-cell>
          <table:table-cell office:value-type="string" calcext:value-type="string">
            <text:p>Utilidades domésticas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vassourasmendonca.com.br</text:p>
          </table:table-cell>
          <table:table-cell office:value-type="string" calcext:value-type="string">
            <text:p>Rodos, vassouras e materiais de limpeza (150+ itens desde 1995)</text:p>
          </table:table-cell>
          <table:table-cell office:value-type="string" calcext:value-type="string">
            <text:p>Moldes de injeção p/ cabos, suportes e lâminas de rodo; peças em PEAD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Visita técnica + amostra usinada</text:p>
          </table:table-cell>
          <table:table-cell office:value-type="string" calcext:value-type="string">
            <text:p>Molde novo em alumínio custa fração do aço — ideal p/ mix de 150 itens</text:p>
          </table:table-cell>
          <table:table-cell office:value-type="string" calcext:value-type="string">
            <text:p><text:a xlink:href="https://www.google.com/search?q=vassouras+mendonça+telefone&amp;sca_esv=d7a897ae2fa4bc83&amp;rlz=1C1PNFE_enBR1221&amp;biw=1366&amp;bih=641&amp;sxsrf=APpeQnvazgY0PSRTGeLbJqZ-YDiGzYAZDw%3A1783455497780&amp;ei=CV9NapCZL_em5OUP4dvceQ&amp;ved=0ahUKEwjQwau7scGVAxV3E7kGHeEtNw8Q4dUDCBA&amp;uact=5&amp;oq=vassouras+mendonça+telefone&amp;gs_lp=Egxnd3Mtd2l6LXNlcnAiHHZhc3NvdXJhcyBtZW5kb27Dp2EgdGVsZWZvbmUyBRAhGKABMgUQIRigATIFECEYoAEyBRAhGJ8FSI8jUABYhiJwAXgAkAEAmAHtBKAB7TOqAQ0wLjEwLjExLjEuMi4yuAEDyAEA-AEBmAIboAKtPKgCFMICBxAjGOoCGCfCAgoQIxjwBRjqAhgnwgIQEC4YAxiPARjqAhi0AtgBAcICEBAAGAMYjwEY6gIYtALYAQHCAgQQIxgnwgIIEC4YgAQYsQPCAgsQLhiDARixAxiABMICDhAuGIAEGLEDGMcBGNEDwgIIEAAYgAQYsQPCAgsQABiABBiKBRixA8ICDhAuGIAEGIoFGLEDGIMBwgILEC4YgAQYsQMYgwHCAggQLhixAxiABMICBRAAGIAEwgIOEAAYgAQYigUYsQMYgwHCAgoQABiABBgUGIcCwgINEC4YFBiHAhixAxiABMICCxAuGK8BGMcBGIAEwgILEC4YgAQYxwEYrwHCAg4QLhiABBjHARivARiOBcICBRAuGIAEwgIOEC4YrwEYxwEYgAQYjgXCAgYQABgWGB7CAgIQJsICCBAAGIAEGKIEwgIFEAAY7wXCAgQQIRgVmANB8QVLEqN749rGBroGBggBEAEYCpIHDDEuNi4xNC4yLjIuMqAH3uUBsgcMMC42LjE0LjIuMi4yuAfsO8IHCjMtNC4xOS4zLjHIB_oGgAgB&amp;sclient=gws-wiz-serp#" xlink:type="simple">(34) 3212-5317</text:a> </text:p>
          </table:table-cell>
          <table:table-cell table:number-columns-repeated="2"/>
          <table:table-cell table:style-name="ce12" table:number-columns-repeated="1636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pet Ind. de Embalagens e Frascos Plásticos</text:p>
          </table:table-cell>
          <table:table-cell office:value-type="string" calcext:value-type="string">
            <text:p>Transformação plástica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09.170.802/0001-14</text:p>
          </table:table-cell>
          <table:table-cell office:value-type="string" calcext:value-type="string">
            <text:p>Rua dos Teófilos 201, Distrito Industrial</text:p>
          </table:table-cell>
          <table:table-cell office:value-type="string" calcext:value-type="string">
            <text:p>Frascos e embalagens plásticas (sopro)</text:p>
          </table:table-cell>
          <table:table-cell office:value-type="string" calcext:value-type="string">
            <text:p>Moldes de sopro em alumínio (aplicação clássica), reparo de cavidades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Visita técnica + amostra usinada</text:p>
          </table:table-cell>
          <table:table-cell office:value-type="string" calcext:value-type="string">
            <text:p>Molde de sopro alumínio local = frasco novo em semanas, não meses</text:p>
          </table:table-cell>
          <table:table-cell office:value-type="string" calcext:value-type="string">
            <text:p><text:a xlink:href="https://www.google.com/search?q=repet+industria+de+embalagens+e+frascos+plasticos+ltda+telefone&amp;sca_esv=d7a897ae2fa4bc83&amp;rlz=1C1PNFE_enBR1221&amp;biw=1366&amp;bih=641&amp;sxsrf=APpeQnt9PethwJRYbAZNwwIaa4LTL5Dc_g%3A1783455617288&amp;ei=gV9NaqqHEbmq5OUPourRyAI&amp;ved=0ahUKEwjqy6n0scGVAxU5FbkGHSJ1FCkQ4dUDCBA&amp;uact=5&amp;oq=repet+industria+de+embalagens+e+frascos+plasticos+ltda+telefone&amp;gs_lp=Egxnd3Mtd2l6LXNlcnAiP3JlcGV0IGluZHVzdHJpYSBkZSBlbWJhbGFnZW5zIGUgZnJhc2NvcyBwbGFzdGljb3MgbHRkYSB0ZWxlZm9uZTIFECEYkgMyBRAhGJIDMgUQIRiSAzIFECEYkgMyBRAhGJIDMgUQIRiSA0ifQlAAWOpAcAV4AZABAJgBwgKgAYMhqgEIMC4xNi40LjK4AQPIAQD4AQGYAhmgAqUlqAIUwgIHECMY6gIYJ8ICChAjGPAFGOoCGCfCAhAQABgDGI8BGOoCGLQC2AEBwgIQEC4YAxiPARjqAhi0AtgBAcICBBAjGCfCAgsQLhiABBixAxiDAcICDhAuGMcBGLEDGNEDGIAEwgIFEC4YgATCAggQABiABBixA8ICDhAAGIAEGIoFGLEDGIMBwgIIEC4YgAQYsQPCAgsQABiABBixAxiDAcICBRAAGIAEwgIKEAAYgAQYFBiHAsICEBAAGIAEGIoFGEMYsQMYgwHCAgoQABiABBiKBRhDwgIHECMYsQIYJ8ICDxAAGIAEGAoYCxixAxiDAcICCRAAGIAEGAoYC8ICDBAAGIAEGAoYCxixA8ICEBAAGIAEGIoFGAoYsQMYgwHCAgcQABiABBgKwgINEAAYgAQYigUYQxixA8ICExAuGBQYrwEYxwEYhwIYgAQYjgXCAgsQLhivARjHARiABMICExAuGIAEGBQYhwIYxwEYrwEYjgXCAgYQABgWGB7CAggQABgWGB4YCsICDhAuGIAEGMcBGK8BGI4FwgICECbCAgUQABjvBcICBRAhGKABwgIFECEYnwWYA0bxBW9K-Mn0jZFFugYGCAEQARgKkgcINS43LjExLjKgB46QAbIHCDAuNy4xMS4yuAfiI8IHCjItMS44LjE0LjLIB5cFgAgB&amp;sclient=gws-wiz-serp#" xlink:type="simple">(34) 3213-9501</text:a> </text:p>
          </table:table-cell>
          <table:table-cell table:number-columns-repeated="2"/>
          <table:table-cell table:style-name="ce12" table:number-columns-repeated="1636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mplastic Ind. e Com. de Plásticos</text:p>
          </table:table-cell>
          <table:table-cell office:value-type="string" calcext:value-type="string">
            <text:p>Transformação plástica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20.013.983/0001-08</text:p>
          </table:table-cell>
          <table:table-cell office:value-type="string" calcext:value-type="string">
            <text:p>Rua Maria Quitéria 96, Marta Helena - emplastic.com.br</text:p>
          </table:table-cell>
          <table:table-cell office:value-type="string" calcext:value-type="string">
            <text:p>Embalagens de material plástico</text:p>
          </table:table-cell>
          <table:table-cell office:value-type="string" calcext:value-type="string">
            <text:p>Moldes e ferramental, peças de máquina em PEAD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Visita técnica + amostra usinada</text:p>
          </table:table-cell>
          <table:table-cell office:value-type="string" calcext:value-type="string">
            <text:p>Ferramental e reposição local sem depender de SP</text:p>
          </table:table-cell>
          <table:table-cell office:value-type="string" calcext:value-type="string">
            <text:p><text:a xlink:href="https://www.google.com/search?q=Emplastic+Ind.+e+Com.+de+Plásticos+telefone&amp;sca_esv=d7a897ae2fa4bc83&amp;rlz=1C1PNFE_enBR1221&amp;biw=1366&amp;bih=641&amp;sxsrf=APpeQnvk4SBb1O0imvsvI_D1AeSViHU1pQ%3A1783455649453&amp;ei=oV9NaouhG6zL5OUP9rXXKQ&amp;ved=0ahUKEwjL9dSDssGVAxWsJbkGHfbaNQUQ4dUDCBA&amp;uact=5&amp;oq=Emplastic+Ind.+e+Com.+de+Plásticos+telefone&amp;gs_lp=Egxnd3Mtd2l6LXNlcnAiLEVtcGxhc3RpYyBJbmQuIGUgQ29tLiBkZSBQbMOhc3RpY29zIHRlbGVmb25lMgUQIRigATIFECEYoAEyBRAhGKABSKgXUABYphZwAXgBkAEAmAHoAaABvw2qAQUwLjYuM7gBA8gBAPgBAfgBApgCCqAC3Q-oAhTCAgcQIxjqAhgnwgIQEAAYAxiPARjqAhi0AtgBAcICEBAuGAMYjwEY6gIYtALYAQGYA0LxBfNB6U-2Mb3sugYGCAEQARgKkgcFMS4zLjagB5UcsgcFMC4zLja4B5sPwgcHMy05LjAuMcgHqAGACAE&amp;sclient=gws-wiz-serp#" xlink:type="simple">(34) 3212-0700</text:a> </text:p>
          </table:table-cell>
          <table:table-cell table:number-columns-repeated="2"/>
          <table:table-cell table:style-name="ce12" table:number-columns-repeated="1636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uper'Sol Ind. e Com.</text:p>
          </table:table-cell>
          <table:table-cell office:value-type="string" calcext:value-type="string">
            <text:p>Transformação plástica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02.389.045/0001-25</text:p>
          </table:table-cell>
          <table:table-cell office:value-type="string" calcext:value-type="string">
            <text:p>Rua Nivaldo Guerreiro Nunes 840, Distrito Industrial</text:p>
          </table:table-cell>
          <table:table-cell office:value-type="string" calcext:value-type="string">
            <text:p>Embalagens plásticas</text:p>
          </table:table-cell>
          <table:table-cell office:value-type="string" calcext:value-type="string">
            <text:p>Moldes de sopro/injeção, manutenção de ferramental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Visita técnica + amostra usinada</text:p>
          </table:table-cell>
          <table:table-cell office:value-type="string" calcext:value-type="string">
            <text:p>Reparo emergencial de molde no mesmo dia (vizinho de bairro)</text:p>
          </table:table-cell>
          <table:table-cell office:value-type="string" calcext:value-type="string">
            <text:p><text:a xlink:href="https://www.google.com/search?q=Super%27Sol+Ind.+e+Com.+telefone&amp;sca_esv=d7a897ae2fa4bc83&amp;rlz=1C1PNFE_enBR1221&amp;biw=1366&amp;bih=641&amp;sxsrf=APpeQnsJ8tooMrNN0y4Mr660bfgf7tIfgQ%3A1783455673257&amp;ei=uV9NapmeD5Dc5OUP_s3x-A8&amp;ved=0ahUKEwjZ3oGPssGVAxUQLrkGHf5mHP8Q4dUDCBA&amp;uact=5&amp;oq=Super%27Sol+Ind.+e+Com.+telefone&amp;gs_lp=Egxnd3Mtd2l6LXNlcnAiHlN1cGVyJ1NvbCBJbmQuIGUgQ29tLiB0ZWxlZm9uZTIHECEYChigATIHECEYChigAUjVFlAAWJkVcAF4AZABAJgB9AGgAfoOqgEFMC41LjW4AQPIAQD4AQH4AQKYAgugAq8RqAIUwgIHECMY6gIYJ8ICEBAAGAMYjwEY6gIYtALYAQHCAhAQLhgDGI8BGOoCGLQC2AEBwgIGEAAYFhgewgICECbCAggQABiABBiiBMICBRAAGO8FwgIEECEYFZgDPfEFmx4eyBIwatC6BgYIARABGAqSBwUxLjQuNqAH1yWyBwUwLjQuNrgH8hDCBwkyLTMuNS4yLjHIB8YBgAgB&amp;sclient=gws-wiz-serp#" xlink:type="simple">(34) 3213-1577</text:a></text:p>
          </table:table-cell>
          <table:table-cell table:number-columns-repeated="2"/>
          <table:table-cell table:style-name="ce12" table:number-columns-repeated="1636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4Planet (Alves Caetano Ind. e Com. de Plástico)</text:p>
          </table:table-cell>
          <table:table-cell office:value-type="string" calcext:value-type="string">
            <text:p>Transformação plástica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48.137.157/0001-90</text:p>
          </table:table-cell>
          <table:table-cell office:value-type="string" calcext:value-type="string">
            <text:p>Rua Ceará 2900, Custódio Pereira</text:p>
          </table:table-cell>
          <table:table-cell office:value-type="string" calcext:value-type="string">
            <text:p>Embalagens plásticas (empresa jovem)</text:p>
          </table:table-cell>
          <table:table-cell office:value-type="string" calcext:value-type="string">
            <text:p>Primeiro ferramental próprio em alumínio, baixo investimento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Visita técnica + amostra usinada</text:p>
          </table:table-cell>
          <table:table-cell office:value-type="string" calcext:value-type="string">
            <text:p>Empresa em crescimento: molde acessível p/ lançar produto próprio</text:p>
          </table:table-cell>
          <table:table-cell office:value-type="string" calcext:value-type="string">
            <text:p>(34) 3212-0280 </text:p>
          </table:table-cell>
          <table:table-cell table:style-name="ce16" office:value-type="string" calcext:value-type="string">
            <text:p>(34) 99196-0067 </text:p>
          </table:table-cell>
          <table:table-cell/>
          <table:table-cell table:style-name="ce12" table:number-columns-repeated="1636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lfa Ind. e Com. de Plásticos Injetados</text:p>
          </table:table-cell>
          <table:table-cell office:value-type="string" calcext:value-type="string">
            <text:p>Transformação plástica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beraba (enriquecer contato)</text:p>
          </table:table-cell>
          <table:table-cell office:value-type="string" calcext:value-type="string">
            <text:p>Injeção de plásticos</text:p>
          </table:table-cell>
          <table:table-cell office:value-type="string" calcext:value-type="string">
            <text:p>Moldes de injeção alumínio, postiços, reparo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Visita técnica + amostra usinada</text:p>
          </table:table-cell>
          <table:table-cell office:value-type="string" calcext:value-type="string">
            <text:p>Ferramentaria a 100 km em vez de 500 km</text:p>
          </table:table-cell>
          <table:table-cell office:value-type="string" calcext:value-type="string">
            <text:p><text:a xlink:href="https://www.alfaplastic.com.br/#" xlink:type="simple">(34) 3311-7996</text:a> </text:p>
          </table:table-cell>
          <table:table-cell office:value-type="float" office:value="34932128972" calcext:value-type="float">
            <text:p>34932128972</text:p>
          </table:table-cell>
          <table:table-cell/>
          <table:table-cell table:style-name="ce12" table:number-columns-repeated="1636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lastilar Utensílios e Equipamentos</text:p>
          </table:table-cell>
          <table:table-cell office:value-type="string" calcext:value-type="string">
            <text:p>Transformação plástica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66.471.467/0001-28</text:p>
          </table:table-cell>
          <table:table-cell office:value-type="string" calcext:value-type="string">
            <text:p>Av. Floriano Peixoto 1461, N. Sra. Aparecida</text:p>
          </table:table-cell>
          <table:table-cell office:value-type="string" calcext:value-type="string">
            <text:p>Utensílios e equipamentos plásticos (desde 1993)</text:p>
          </table:table-cell>
          <table:table-cell office:value-type="string" calcext:value-type="string">
            <text:p>Moldes p/ linha de utensílios, peças usinadas em PEAD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sita técnica + amostra usinada</text:p>
          </table:table-cell>
          <table:table-cell office:value-type="string" calcext:value-type="string">
            <text:p>Renovação de moldes antigos da linha</text:p>
          </table:table-cell>
          <table:table-cell office:value-type="string" calcext:value-type="string">
            <text:p><text:a xlink:href="https://www.google.com/search?q=Plastilar+Utensílios+e+Equipamentos+telefone&amp;sca_esv=d7a897ae2fa4bc83&amp;rlz=1C1PNFE_enBR1221&amp;biw=1366&amp;bih=641&amp;sxsrf=APpeQnvpurEKdtoZaaxFDoiB6qvip4tF3A%3A1783455805946&amp;ei=PWBNasKrOeWK5OUPqtvuuAg&amp;ved=0ahUKEwiCvqTOssGVAxVlBbkGHaqtG4cQ4dUDCBA&amp;uact=5&amp;oq=Plastilar+Utensílios+e+Equipamentos+telefone&amp;gs_lp=Egxnd3Mtd2l6LXNlcnAiLVBsYXN0aWxhciBVdGVuc8OtbGlvcyBlIEVxdWlwYW1lbnRvcyB0ZWxlZm9uZTIFECEYoAEyBRAhGKABMgUQIRigATIFECEYoAFIjxFQAFjjD3ABeACQAQCYAfYBoAHrDqoBBTAuMy42uAEDyAEA-AEB-AECmAIKoAKiEagCFMICBxAjGOoCGCfCAhAQABgDGI8BGOoCGLQC2AEBwgIQEC4YAxiPARjqAhi0AtgBAcICDhAuGIAEGMcBGK8BGI4FwgIFEAAYgATCAgIQJsICBRAAGO8FwgIIEAAYiQUYogSYA0jxBVNpyee3G1H9ugYGCAEQARgKkgcFMS4wLjmgB-QtsgcDMi05uAfZEMIHBzMtNy4yLjHIB9MBgAgB&amp;sclient=gws-wiz-serp#" xlink:type="simple">(34) 3235-6565</text:a> </text:p>
          </table:table-cell>
          <table:table-cell table:style-name="ce16" office:value-type="string" calcext:value-type="string">
            <text:p><text:a xlink:href="https://www.google.com/search?q=Plastilar+Utensílios+e+Equipamentos+telefone&amp;sca_esv=d7a897ae2fa4bc83&amp;rlz=1C1PNFE_enBR1221&amp;biw=1366&amp;bih=641&amp;sxsrf=APpeQnvpurEKdtoZaaxFDoiB6qvip4tF3A%3A1783455805946&amp;ei=PWBNasKrOeWK5OUPqtvuuAg&amp;ved=0ahUKEwiCvqTOssGVAxVlBbkGHaqtG4cQ4dUDCBA&amp;uact=5&amp;oq=Plastilar+Utensílios+e+Equipamentos+telefone&amp;gs_lp=Egxnd3Mtd2l6LXNlcnAiLVBsYXN0aWxhciBVdGVuc8OtbGlvcyBlIEVxdWlwYW1lbnRvcyB0ZWxlZm9uZTIFECEYoAEyBRAhGKABMgUQIRigATIFECEYoAFIjxFQAFjjD3ABeACQAQCYAfYBoAHrDqoBBTAuMy42uAEDyAEA-AEB-AECmAIKoAKiEagCFMICBxAjGOoCGCfCAhAQABgDGI8BGOoCGLQC2AEBwgIQEC4YAxiPARjqAhi0AtgBAcICDhAuGIAEGMcBGK8BGI4FwgIFEAAYgATCAgIQJsICBRAAGO8FwgIIEAAYiQUYogSYA0jxBVNpyee3G1H9ugYGCAEQARgKkgcFMS4wLjmgB-QtsgcDMi05uAfZEMIHBzMtNy4yLjHIB9MBgAgB&amp;sclient=gws-wiz-serp#" xlink:type="simple">(34) 98857-7118</text:a> </text:p>
          </table:table-cell>
          <table:table-cell/>
          <table:table-cell table:style-name="ce12" table:number-columns-repeated="1636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rasil Borrachas</text:p>
          </table:table-cell>
          <table:table-cell office:value-type="string" calcext:value-type="string">
            <text:p>Borracha e EVA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Av. Antônio Thomaz F. de Rezende 1370 - (34) 3233-7001</text:p>
          </table:table-cell>
          <table:table-cell office:value-type="string" calcext:value-type="string">
            <text:p>Artefatos de borracha e mantas EVA (desde 2001)</text:p>
          </table:table-cell>
          <table:table-cell office:value-type="string" calcext:value-type="string">
            <text:p>Moldes p/ artefatos de borracha, facas e gabaritos de corte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sita técnica + amostra usinada</text:p>
          </table:table-cell>
          <table:table-cell office:value-type="string" calcext:value-type="string">
            <text:p>Moldes de vulcanização em alumínio com cavidades precisas</text:p>
          </table:table-cell>
          <table:table-cell office:value-type="string" calcext:value-type="string">
            <text:p><text:a xlink:href="https://www.google.com/search?q=Brasil+Borrachas+telefone&amp;sca_esv=d7a897ae2fa4bc83&amp;rlz=1C1PNFE_enBR1221&amp;biw=1366&amp;bih=641&amp;sxsrf=APpeQnta-yna9i132r9xb4AtfpFIkWGtnw%3A1783455847783&amp;ei=Z2BNaq-uL_-u5NoP6MW-yQk&amp;ved=0ahUKEwjv_Z3issGVAxV_F1kFHeiiL5kQ4dUDCBA&amp;uact=5&amp;oq=Brasil+Borrachas+telefone&amp;gs_lp=Egxnd3Mtd2l6LXNlcnAiGUJyYXNpbCBCb3JyYWNoYXMgdGVsZWZvbmUyBhAAGBYYHjIGEAAYFhgeMgUQABjvBUj-F1C-BljCFnACeAGQAQCYAeIBoAH4DaoBBTAuOC4yuAEDyAEA-AEB-AECmAIMoALyEKgCFMICChAAGEcY1gQYsAPCAgcQIxjqAhgnwgIQEAAYAxiPARjqAhi0AtgBAcICEBAuGAMYjwEY6gIYtALYAQHCAg4QLhivARjHARiABBiOBcICBRAAGIAEwgICECaYA0vxBV1Ljfe9Mo5iiAYBkAYIugYGCAEQARgKkgcFMi40LjagB7ItsgcFMC40Lja4B4IQwgcHMy03LjQuMcgHqQKACAE&amp;sclient=gws-wiz-serp#" xlink:type="simple">(34) 3233-7001</text:a> </text:p>
          </table:table-cell>
          <table:table-cell table:style-name="ce16" office:value-type="string" calcext:value-type="string">
            <text:p><text:a xlink:href="https://www.google.com/search?q=Brasil+Borrachas+telefone&amp;sca_esv=d7a897ae2fa4bc83&amp;rlz=1C1PNFE_enBR1221&amp;biw=1366&amp;bih=641&amp;sxsrf=APpeQnta-yna9i132r9xb4AtfpFIkWGtnw%3A1783455847783&amp;ei=Z2BNaq-uL_-u5NoP6MW-yQk&amp;ved=0ahUKEwjv_Z3issGVAxV_F1kFHeiiL5kQ4dUDCBA&amp;uact=5&amp;oq=Brasil+Borrachas+telefone&amp;gs_lp=Egxnd3Mtd2l6LXNlcnAiGUJyYXNpbCBCb3JyYWNoYXMgdGVsZWZvbmUyBhAAGBYYHjIGEAAYFhgeMgUQABjvBUj-F1C-BljCFnACeAGQAQCYAeIBoAH4DaoBBTAuOC4yuAEDyAEA-AEB-AECmAIMoALyEKgCFMICChAAGEcY1gQYsAPCAgcQIxjqAhgnwgIQEAAYAxiPARjqAhi0AtgBAcICEBAuGAMYjwEY6gIYtALYAQHCAg4QLhivARjHARiABBiOBcICBRAAGIAEwgICECaYA0vxBV1Ljfe9Mo5iiAYBkAYIugYGCAEQARgKkgcFMi40LjagB7ItsgcFMC40Lja4B4IQwgcHMy03LjQuMcgHqQKACAE&amp;sclient=gws-wiz-serp#" xlink:type="simple">(34) 99687-7001</text:a> </text:p>
          </table:table-cell>
          <table:table-cell/>
          <table:table-cell table:style-name="ce12" table:number-columns-repeated="1636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Udiforte Ind. e Com.</text:p>
          </table:table-cell>
          <table:table-cell office:value-type="string" calcext:value-type="string">
            <text:p>Transformação plástica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02.993.266/0001-08</text:p>
          </table:table-cell>
          <table:table-cell office:value-type="string" calcext:value-type="string">
            <text:p>Estr. Comunitária Neuza Rezende 4296, Distrito Industrial</text:p>
          </table:table-cell>
          <table:table-cell office:value-type="string" calcext:value-type="string">
            <text:p>Artefatos plásticos p/ construção (maior do CNAE na cidade)</text:p>
          </table:table-cell>
          <table:table-cell office:value-type="string" calcext:value-type="string">
            <text:p>Ferramental, matrizes de extrusão, peças de reposição usinadas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sita técnica + amostra usinada</text:p>
          </table:table-cell>
          <table:table-cell office:value-type="string" calcext:value-type="string">
            <text:p>Reposição rápida de peças de máquina que param a produção</text:p>
          </table:table-cell>
          <table:table-cell office:value-type="string" calcext:value-type="string">
            <text:p><text:a xlink:href="https://parafa.com.br/uberlandia-mg/plastico/plasticos-artef/1294895/udiforte-industria-e-comercio-ltda" xlink:type="simple">34 3213-1318</text:a> </text:p>
          </table:table-cell>
          <table:table-cell table:number-columns-repeated="2"/>
          <table:table-cell table:style-name="ce12" table:number-columns-repeated="1636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orm Ind. Fabricação e Projetos</text:p>
          </table:table-cell>
          <table:table-cell office:value-type="string" calcext:value-type="string">
            <text:p>Transformação plástica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33.254.986/0001-85</text:p>
          </table:table-cell>
          <table:table-cell office:value-type="string" calcext:value-type="string">
            <text:p>Av. Farroupilhas 438, N. Sra. das Graças</text:p>
          </table:table-cell>
          <table:table-cell office:value-type="string" calcext:value-type="string">
            <text:p>Fabricação e projetos em plástico</text:p>
          </table:table-cell>
          <table:table-cell office:value-type="string" calcext:value-type="string">
            <text:p>Parceria projeto+molde; usinagem de protótipos funcionais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sita técnica + amostra usinada</text:p>
          </table:table-cell>
          <table:table-cell office:value-type="string" calcext:value-type="string">
            <text:p>Do projeto ao molde na mesma região</text:p>
          </table:table-cell>
          <table:table-cell office:value-type="string" calcext:value-type="string">
            <text:p><text:a xlink:href="https://www.google.com/search?q=Form+Ind.+Fabricação+e+Projetos+telefone&amp;sca_esv=d7a897ae2fa4bc83&amp;rlz=1C1PNFE_enBR1221&amp;biw=1366&amp;bih=641&amp;sxsrf=APpeQns12X0T2OyJMIya9jHbfJbW1P6fVQ%3A1783455935282&amp;ei=v2BNaunhEJvi5NoP0pKPiQw&amp;ved=0ahUKEwipvfqLs8GVAxUbMVkFHVLJI8EQ4dUDCBA&amp;uact=5&amp;oq=Form+Ind.+Fabricação+e+Projetos+telefone&amp;gs_lp=Egxnd3Mtd2l6LXNlcnAiKkZvcm0gSW5kLiBGYWJyaWNhw6fDo28gZSBQcm9qZXRvcyB0ZWxlZm9uZTIFECEYoAEyBRAhGKABSJImUIwFWI4lcAJ4AZABAJgBhAKgAYUPqgEFMC4yLje4AQPIAQD4AQH4AQKYAgugAqQRqAIUwgIKEAAYRxjWBBiwA8ICBxAjGOoCGCfCAhAQABgDGI8BGOoCGLQC2AEBwgIQEC4YAxiPARjqAhi0AtgBAcICBxAhGAoYoAGYAz_xBVR3kwImVx0NiAYBkAYIugYGCAEQARgKkgcFMi4xLjigB-wSsgcFMC4xLji4B8MQwgcJMi0xLjguMS4xyAeqAYAIAQ&amp;sclient=gws-wiz-serp#" xlink:type="simple">(34) 3231-8520</text:a> </text:p>
          </table:table-cell>
          <table:table-cell table:number-columns-repeated="2"/>
          <table:table-cell table:style-name="ce12" table:number-columns-repeated="1636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ya Cosméticos</text:p>
          </table:table-cell>
          <table:table-cell office:value-type="string" calcext:value-type="string">
            <text:p>Cosméticos e higiene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Av. Com. Alexandrino Garcia 821, Marta Helena - ayacosmeticos.com.br</text:p>
          </table:table-cell>
          <table:table-cell office:value-type="string" calcext:value-type="string">
            <text:p>Terceirização de cosméticos (desde 2006)</text:p>
          </table:table-cell>
          <table:table-cell office:value-type="string" calcext:value-type="string">
            <text:p>Peças de envase (estrelas, guias, roscas) em PEAD; gabaritos p/ frascos de clientes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-mail + WhatsApp + visita produção</text:p>
          </table:table-cell>
          <table:table-cell office:value-type="string" calcext:value-type="string">
            <text:p>Troca de formato de frasco sem parar a linha: jogo de peças sob medida</text:p>
          </table:table-cell>
          <table:table-cell office:value-type="string" calcext:value-type="string">
            <text:p><text:a xlink:href="https://www.google.com/search?q=Aya+Cosméticos+telefone&amp;sca_esv=d7a897ae2fa4bc83&amp;rlz=1C1PNFE_enBR1221&amp;biw=1366&amp;bih=641&amp;sxsrf=APpeQnvdKMUZywZyt-WIjvHAvrihOP-EPA%3A1783455979375&amp;ei=62BNarC5Fuiy5NoP76nn4AY&amp;ved=0ahUKEwjw2v2gs8GVAxVoGVkFHe_UGWwQ4dUDCBA&amp;uact=5&amp;oq=Aya+Cosméticos+telefone&amp;gs_lp=Egxnd3Mtd2l6LXNlcnAiGEF5YSBDb3Ntw6l0aWNvcyB0ZWxlZm9uZTIGEAAYFhgeMgYQABgWGB4yBhAAGBYYHjIGEAAYFhgeMgYQABgWGB4yAhAmMgUQABjvBTIFEAAY7wUyBRAAGO8FSPkiUPMGWLghcAF4A5ABAJgB3AagAdcIqgEHMi0xLjYtMbgBA8gBAPgBAfgBApgCBaACzQqoAhTCAgQQABhHwgIHECMY6gIYJ8ICEBAAGAMYjwEY6gIYtALYAQHCAg4QLhiABBjHARivARiOBZgDRvEFEYKJPSUdhiWIBgGQBgi6BgYIARABGAqSBwkzLjAuMS42LTGgB6wOsgcHMi0xLjYtMbgHuAnCBwU0LTMuMsgHzwGACAE&amp;sclient=gws-wiz-serp#" xlink:type="simple">(34) 3211-3344</text:a> </text:p>
          </table:table-cell>
          <table:table-cell table:style-name="ce16" office:value-type="string" calcext:value-type="string">
            <text:p><text:a xlink:href="https://www.google.com/search?q=Aya+Cosméticos+telefone&amp;sca_esv=d7a897ae2fa4bc83&amp;rlz=1C1PNFE_enBR1221&amp;biw=1366&amp;bih=641&amp;sxsrf=APpeQnvdKMUZywZyt-WIjvHAvrihOP-EPA%3A1783455979375&amp;ei=62BNarC5Fuiy5NoP76nn4AY&amp;ved=0ahUKEwjw2v2gs8GVAxVoGVkFHe_UGWwQ4dUDCBA&amp;uact=5&amp;oq=Aya+Cosméticos+telefone&amp;gs_lp=Egxnd3Mtd2l6LXNlcnAiGEF5YSBDb3Ntw6l0aWNvcyB0ZWxlZm9uZTIGEAAYFhgeMgYQABgWGB4yBhAAGBYYHjIGEAAYFhgeMgYQABgWGB4yAhAmMgUQABjvBTIFEAAY7wUyBRAAGO8FSPkiUPMGWLghcAF4A5ABAJgB3AagAdcIqgEHMi0xLjYtMbgBA8gBAPgBAfgBApgCBaACzQqoAhTCAgQQABhHwgIHECMY6gIYJ8ICEBAAGAMYjwEY6gIYtALYAQHCAg4QLhiABBjHARivARiOBZgDRvEFEYKJPSUdhiWIBgGQBgi6BgYIARABGAqSBwkzLjAuMS42LTGgB6wOsgcHMi0xLjYtMbgHuAnCBwU0LTMuMsgHzwGACAE&amp;sclient=gws-wiz-serp#" xlink:type="simple">(34) 99979-5161</text:a> </text:p>
          </table:table-cell>
          <table:table-cell/>
          <table:table-cell table:style-name="ce12" table:number-columns-repeated="1636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Uberlândia Refrescos (Coca-Cola)</text:p>
          </table:table-cell>
          <table:table-cell office:value-type="string" calcext:value-type="string">
            <text:p>Alimentos e bebidas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Distrito Industrial</text:p>
          </table:table-cell>
          <table:table-cell office:value-type="string" calcext:value-type="string">
            <text:p>Bebidas (franquia Coca-Cola)</text:p>
          </table:table-cell>
          <table:table-cell office:value-type="string" calcext:value-type="string">
            <text:p>Estrelas, guias e sem-fins de garrafa em PEAD/PEUHMW p/ linhas de envase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dastro fornecedor + visita PCM</text:p>
          </table:table-cell>
          <table:table-cell office:value-type="string" calcext:value-type="string">
            <text:p>Peça de desgaste entregue em 48h em vez de semanas</text:p>
          </table:table-cell>
          <table:table-cell office:value-type="string" calcext:value-type="string">
            <text:p><text:a xlink:href="https://www.google.com/search?q=Uberlândia+Refrescos+%28Coca-Cola%29+telefone&amp;sca_esv=d7a897ae2fa4bc83&amp;rlz=1C1PNFE_enBR1221&amp;biw=1366&amp;bih=641&amp;sxsrf=APpeQnsxGY_QyBCKeBNFc5ZENpHox0XwyA%3A1783456010874&amp;ei=CmFNasbyNJfU5NoP0LLduAU&amp;ved=0ahUKEwjGn4Cws8GVAxUXKlkFHVBZF1cQ4dUDCBA&amp;uact=5&amp;oq=Uberlândia+Refrescos+%28Coca-Cola%29+telefone&amp;gs_lp=Egxnd3Mtd2l6LXNlcnAiKlViZXJsw6JuZGlhIFJlZnJlc2NvcyAoQ29jYS1Db2xhKSB0ZWxlZm9uZTIFEAAY7wUyBRAAGO8FMggQABiABBiiBDIIEAAYgAQYogQyBRAAGO8FSMERUABYihBwAXgAkAEAmAHRAaABgw6qAQUwLjguMrgBA8gBAPgBAfgBApgCC6AC1BCoAhTCAgcQIxjqAhgnwgIQEAAYAxiPARjqAhi0AtgBAcICEBAuGAMYjwEY6gIYtALYAQHCAgkQABgWGB4YyQPCAgYQABgWGB7CAgkQABgWGB4YkgPCAgIQJsICBRAhGKABmANI8QX36kSXj3q39boGBggBEAEYCpIHBTEuNC42oAf-KrIHBTAuNC42uAeLEMIHCTItMy4yLjUuMcgH6gGACAE&amp;sclient=gws-wiz-serp#" xlink:type="simple">(34) 3233-7700</text:a> </text:p>
          </table:table-cell>
          <table:table-cell table:number-columns-repeated="2"/>
          <table:table-cell table:style-name="ce12" table:number-columns-repeated="1636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olitrisa - Polietileno do Triângulo</text:p>
          </table:table-cell>
          <table:table-cell office:value-type="string" calcext:value-type="string">
            <text:p>Transformação plástica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beraba (enriquecer contato)</text:p>
          </table:table-cell>
          <table:table-cell office:value-type="string" calcext:value-type="string">
            <text:p>Artefatos de polietileno</text:p>
          </table:table-cell>
          <table:table-cell office:value-type="string" calcext:value-type="string">
            <text:p>Usinagem de PEAD é sua especialidade — moldes e peças acabadas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sita técnica + amostra usinada</text:p>
          </table:table-cell>
          <table:table-cell office:value-type="string" calcext:value-type="string">
            <text:p>Acabamento usinado em peças rotomoldadas/extrudadas</text:p>
          </table:table-cell>
          <table:table-cell office:value-type="string" calcext:value-type="string">
            <text:p>(34) 3316 1033 </text:p>
          </table:table-cell>
          <table:table-cell table:number-columns-repeated="2"/>
          <table:table-cell table:style-name="ce12" table:number-columns-repeated="1636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HRL Telhas e Artefatos</text:p>
          </table:table-cell>
          <table:table-cell office:value-type="string" calcext:value-type="string">
            <text:p>Transformação plástica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30.568.285/0001-22</text:p>
          </table:table-cell>
          <table:table-cell office:value-type="string" calcext:value-type="string">
            <text:p>Rua Nivaldo Guerreiro Nunes 871, Distrito Industrial</text:p>
          </table:table-cell>
          <table:table-cell office:value-type="string" calcext:value-type="string">
            <text:p>Telhas e artefatos plásticos p/ construção</text:p>
          </table:table-cell>
          <table:table-cell office:value-type="string" calcext:value-type="string">
            <text:p>Matrizes e gabaritos, peças de reposição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sita técnica + amostra usinada</text:p>
          </table:table-cell>
          <table:table-cell office:value-type="string" calcext:value-type="string">
            <text:p>Manutenção de matrizes sem frete p/ fora</text:p>
          </table:table-cell>
          <table:table-cell office:value-type="string" calcext:value-type="string">
            <text:p><text:a xlink:href="https://www.google.com/search?q=HRL+Telhas+e+Artefatos+telefone&amp;sca_esv=d7a897ae2fa4bc83&amp;rlz=1C1PNFE_enBR1221&amp;biw=1366&amp;bih=641&amp;sxsrf=APpeQnv0P1LB_Z7ixjNaq8EyGML7ONOx9Q%3A1783456111079&amp;ei=b2FNarmxBOyj5NoP0J6K-QM&amp;ved=0ahUKEwj5pOTfs8GVAxXsEVkFHVCPIj8Q4dUDCBA&amp;uact=5&amp;oq=HRL+Telhas+e+Artefatos+telefone&amp;gs_lp=Egxnd3Mtd2l6LXNlcnAiH0hSTCBUZWxoYXMgZSBBcnRlZmF0b3MgdGVsZWZvbmUyBhAAGBYYHjIIEAAYgAQYogQyBRAAGO8FMggQABiABBiiBDIIEAAYgAQYogQyCBAAGIAEGKIESK4UUABYohRwAXgBkAEAmAHjBaABswqqAQU1LTEuMbgBA8gBAPgBAfgBApgCA6AC1AuoAhTCAgcQIxjqAhgnwgIQEAAYAxiPARjqAhi0AtgBAcICEBAuGAMYjwEY6gIYtALYAQGYAz_iAwUSATEgQPEFwUzqri10BG26BgYIARABGAqSBwUxLjUtMqAH8weyBwM1LTK4B5QLwgcFNC0yLjHIB4gBgAgB&amp;sclient=gws-wiz-serp#" xlink:type="simple">(34) 3211-6403</text:a> </text:p>
          </table:table-cell>
          <table:table-cell table:style-name="ce16" office:value-type="string" calcext:value-type="string">
            <text:p><text:a xlink:href="https://www.google.com/search?q=HRL+Telhas+e+Artefatos+telefone&amp;sca_esv=d7a897ae2fa4bc83&amp;rlz=1C1PNFE_enBR1221&amp;biw=1366&amp;bih=641&amp;sxsrf=APpeQnv0P1LB_Z7ixjNaq8EyGML7ONOx9Q%3A1783456111079&amp;ei=b2FNarmxBOyj5NoP0J6K-QM&amp;ved=0ahUKEwj5pOTfs8GVAxXsEVkFHVCPIj8Q4dUDCBA&amp;uact=5&amp;oq=HRL+Telhas+e+Artefatos+telefone&amp;gs_lp=Egxnd3Mtd2l6LXNlcnAiH0hSTCBUZWxoYXMgZSBBcnRlZmF0b3MgdGVsZWZvbmUyBhAAGBYYHjIIEAAYgAQYogQyBRAAGO8FMggQABiABBiiBDIIEAAYgAQYogQyCBAAGIAEGKIESK4UUABYohRwAXgBkAEAmAHjBaABswqqAQU1LTEuMbgBA8gBAPgBAfgBApgCA6AC1AuoAhTCAgcQIxjqAhgnwgIQEAAYAxiPARjqAhi0AtgBAcICEBAuGAMYjwEY6gIYtALYAQGYAz_iAwUSATEgQPEFwUzqri10BG26BgYIARABGAqSBwUxLjUtMqAH8weyBwM1LTK4B5QLwgcFNC0yLjHIB4gBgAgB&amp;sclient=gws-wiz-serp#" xlink:type="simple">(34) 99873-6403</text:a> </text:p>
          </table:table-cell>
          <table:table-cell/>
          <table:table-cell table:style-name="ce12" table:number-columns-repeated="1636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ocal Alimentos</text:p>
          </table:table-cell>
          <table:table-cell office:value-type="string" calcext:value-type="string">
            <text:p>Alimentos e bebidas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Distrito Industrial</text:p>
          </table:table-cell>
          <table:table-cell office:value-type="string" calcext:value-type="string">
            <text:p>Alimentos (maior indústria de transformação da cidade)</text:p>
          </table:table-cell>
          <table:table-cell office:value-type="string" calcext:value-type="string">
            <text:p>Peças de desgaste em PEAD alimentício, guias e raspadores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dastro fornecedor + visita PCM</text:p>
          </table:table-cell>
          <table:table-cell office:value-type="string" calcext:value-type="string">
            <text:p>Reposição local reduz estoque de peças críticas</text:p>
          </table:table-cell>
          <table:table-cell office:value-type="string" calcext:value-type="string">
            <text:p>(34) 3228-6100 </text:p>
          </table:table-cell>
          <table:table-cell table:style-name="ce16" office:value-type="string" calcext:value-type="string">
            <text:p><text:a xlink:href="https://www.google.com/search?q=Cocal+Alimentos+telefone&amp;sca_esv=d7a897ae2fa4bc83&amp;rlz=1C1PNFE_enBR1221&amp;biw=1366&amp;bih=641&amp;sxsrf=APpeQnsMDy3xfeQIKJbwtB-gsLmmaVKVqg%3A1783456143583&amp;ei=j2FNar2VI9TV5NoPov-KqAw&amp;ved=0ahUKEwj9mKTvs8GVAxXUKlkFHaK_AsUQ4dUDCBA&amp;uact=5&amp;oq=Cocal+Alimentos+telefone&amp;gs_lp=Egxnd3Mtd2l6LXNlcnAiGENvY2FsIEFsaW1lbnRvcyB0ZWxlZm9uZTIIEAAYFhgeGAoyBhAAGBYYHjIFEAAY7wUyCBAAGIAEGKIEMggQABiJBRiiBEiETFCxCVjjSHACeACQAQCYAdEBoAHdDKoBBTAuOS4xuAEDyAEA-AEB-AECmAIMoALfD6gCFMICCxAAGIAEGKIEGLADwgIIEAAY7wUYsAPCAgcQIxjqAhgnwgIQEC4YAxiPARjqAhi0AtgBAcICEBAAGAMYjwEY6gIYtALYAQHCAgUQABiABMICDhAuGIAEGMcBGK8BGI4FwgICECaYA1jxBTLw50Dm96I8iAYBkAYFugYGCAEQARgKkgcFMi43LjOgB4U2sgcFMC43LjO4B-4OwgcHMy04LjMuMcgHtwKACAE&amp;sclient=gws-wiz-serp#" xlink:type="simple">(34) 3218-9000</text:a> </text:p>
          </table:table-cell>
          <table:table-cell table:style-name="ce16" office:value-type="string" calcext:value-type="string">
            <text:p><text:a xlink:href="https://www.google.com/search?q=Cocal+Alimentos+telefone&amp;sca_esv=d7a897ae2fa4bc83&amp;rlz=1C1PNFE_enBR1221&amp;biw=1366&amp;bih=641&amp;sxsrf=APpeQnsMDy3xfeQIKJbwtB-gsLmmaVKVqg%3A1783456143583&amp;ei=j2FNar2VI9TV5NoPov-KqAw&amp;ved=0ahUKEwj9mKTvs8GVAxXUKlkFHaK_AsUQ4dUDCBA&amp;uact=5&amp;oq=Cocal+Alimentos+telefone&amp;gs_lp=Egxnd3Mtd2l6LXNlcnAiGENvY2FsIEFsaW1lbnRvcyB0ZWxlZm9uZTIIEAAYFhgeGAoyBhAAGBYYHjIFEAAY7wUyCBAAGIAEGKIEMggQABiJBRiiBEiETFCxCVjjSHACeACQAQCYAdEBoAHdDKoBBTAuOS4xuAEDyAEA-AEB-AECmAIMoALfD6gCFMICCxAAGIAEGKIEGLADwgIIEAAY7wUYsAPCAgcQIxjqAhgnwgIQEC4YAxiPARjqAhi0AtgBAcICEBAAGAMYjwEY6gIYtALYAQHCAgUQABiABMICDhAuGIAEGMcBGK8BGI4FwgICECaYA1jxBTLw50Dm96I8iAYBkAYFugYGCAEQARgKkgcFMi43LjOgB4U2sgcFMC43LjO4B-4OwgcHMy04LjMuMcgHtwKACAE&amp;sclient=gws-wiz-serp#" xlink:type="simple">(34) 3228-6181</text:a> </text:p>
          </table:table-cell>
          <table:table-cell table:style-name="ce12" table:number-columns-repeated="1636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tart Química</text:p>
          </table:table-cell>
          <table:table-cell office:value-type="string" calcext:value-type="string">
            <text:p>Química e saneantes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berlândia (desde 1987)</text:p>
          </table:table-cell>
          <table:table-cell office:value-type="string" calcext:value-type="string">
            <text:p>Produtos de limpeza e higienização industrial</text:p>
          </table:table-cell>
          <table:table-cell office:value-type="string" calcext:value-type="string">
            <text:p>Peças de linha de envase em PEAD, bicos e adaptadores usinados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-mail + WhatsApp + visita produção</text:p>
          </table:table-cell>
          <table:table-cell office:value-type="string" calcext:value-type="string">
            <text:p>PEAD resiste a químicos: peças sob medida p/ envase</text:p>
          </table:table-cell>
          <table:table-cell office:value-type="string" calcext:value-type="string">
            <text:p><text:a xlink:href="tel:+553432926100" xlink:type="simple">(34) 3292-6100</text:a> </text:p>
          </table:table-cell>
          <table:table-cell table:number-columns-repeated="2"/>
          <table:table-cell table:style-name="ce12" table:number-columns-repeated="1636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unquímica</text:p>
          </table:table-cell>
          <table:table-cell office:value-type="string" calcext:value-type="string">
            <text:p>Química e saneantes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sunquimica.com (40 anos)</text:p>
          </table:table-cell>
          <table:table-cell office:value-type="string" calcext:value-type="string">
            <text:p>Limpeza e higienização p/ laticínios, frigoríficos e indústrias</text:p>
          </table:table-cell>
          <table:table-cell office:value-type="string" calcext:value-type="string">
            <text:p>Peças de envase e dosagem em PEAD, reposição de linh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-mail + WhatsApp + visita produção</text:p>
          </table:table-cell>
          <table:table-cell office:value-type="string" calcext:value-type="string">
            <text:p>Fornecedor local p/ paradas não programadas</text:p>
          </table:table-cell>
          <table:table-cell office:value-type="string" calcext:value-type="string">
            <text:p><text:a xlink:href="https://www.google.com/search?q=Sunquímica+telefone&amp;sca_esv=d7a897ae2fa4bc83&amp;rlz=1C1PNFE_enBR1221&amp;biw=1366&amp;bih=641&amp;sxsrf=APpeQntos4Q7Z295pUvpCctLH5s-X35yow%3A1783456374683&amp;ei=dmJNapOkKb_e5NoPlvesoQo&amp;ved=0ahUKEwiTt73dtMGVAxU_L1kFHZY7K6QQ4dUDCBA&amp;uact=5&amp;oq=Sunquímica+telefone&amp;gs_lp=Egxnd3Mtd2l6LXNlcnAiFFN1bnF1w61taWNhIHRlbGVmb25lMgUQIRigATIFECEYoAEyBRAhGKABSM8tUJAIWJkscAJ4AZABAJgByxGgAeEsqgEPMy0zLjEuMS4wLjEuMC4xuAEDyAEA-AEB-AECmAIJoAKvMKgCFMICChAAGEcY1gQYsAPCAgcQIxjqAhgnwgIQEAAYAxiPARjqAhi0AtgBAcICEBAuGAMYjwEY6gIYtALYAQHCAg4QLhiABBjHARivARiOBcICBRAAGIAEwgIEEAAYHsICAhAmwgIIEAAYgAQYogTCAgUQABjvBcICCBAAGIkFGKIEmAOlAfEFXzMHXvMesEmIBgGQBgi6BgYIARABGAqSBw8xLjEuMC4yLjMuNy0xLjGgB8QXsgcLMy0yLjMuNy0xLjG4B9EuwgcJMy00LjQuMC4xyAfgAoAIAQ&amp;sclient=gws-wiz-serp#" xlink:type="simple">(34) 3218-3700</text:a> </text:p>
          </table:table-cell>
          <table:table-cell table:style-name="ce16" office:value-type="string" calcext:value-type="string">
            <text:p><text:a xlink:href="https://www.google.com/search?q=Sunquímica+telefone&amp;sca_esv=d7a897ae2fa4bc83&amp;rlz=1C1PNFE_enBR1221&amp;biw=1366&amp;bih=641&amp;sxsrf=APpeQntos4Q7Z295pUvpCctLH5s-X35yow%3A1783456374683&amp;ei=dmJNapOkKb_e5NoPlvesoQo&amp;ved=0ahUKEwiTt73dtMGVAxU_L1kFHZY7K6QQ4dUDCBA&amp;uact=5&amp;oq=Sunquímica+telefone&amp;gs_lp=Egxnd3Mtd2l6LXNlcnAiFFN1bnF1w61taWNhIHRlbGVmb25lMgUQIRigATIFECEYoAEyBRAhGKABSM8tUJAIWJkscAJ4AZABAJgByxGgAeEsqgEPMy0zLjEuMS4wLjEuMC4xuAEDyAEA-AEB-AECmAIJoAKvMKgCFMICChAAGEcY1gQYsAPCAgcQIxjqAhgnwgIQEAAYAxiPARjqAhi0AtgBAcICEBAuGAMYjwEY6gIYtALYAQHCAg4QLhiABBjHARivARiOBcICBRAAGIAEwgIEEAAYHsICAhAmwgIIEAAYgAQYogTCAgUQABjvBcICCBAAGIkFGKIEmAOlAfEFXzMHXvMesEmIBgGQBgi6BgYIARABGAqSBw8xLjEuMC4yLjMuNy0xLjGgB8QXsgcLMy0yLjMuNy0xLjG4B9EuwgcJMy00LjQuMC4xyAfgAoAIAQ&amp;sclient=gws-wiz-serp#" xlink:type="simple">(34) 98442-5441</text:a> </text:p>
          </table:table-cell>
          <table:table-cell/>
          <table:table-cell table:style-name="ce12" table:number-columns-repeated="1636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asic 3D Print</text:p>
          </table:table-cell>
          <table:table-cell office:value-type="string" calcext:value-type="string">
            <text:p>Prototipagem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51.542.319/0001-80</text:p>
          </table:table-cell>
          <table:table-cell office:value-type="string" calcext:value-type="string">
            <text:p>Rua João Batista de Oliveira 107, Shopping Park</text:p>
          </table:table-cell>
          <table:table-cell office:value-type="string" calcext:value-type="string">
            <text:p>Impressão 3D</text:p>
          </table:table-cell>
          <table:table-cell office:value-type="string" calcext:value-type="string">
            <text:p>Parceria: quando o cliente deles precisa escalar, entra o molde em alumínio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rceria de indicação</text:p>
          </table:table-cell>
          <table:table-cell office:value-type="string" calcext:value-type="string">
            <text:p>Do protótipo 3D à pequena série injetada — comissão por indicação</text:p>
          </table:table-cell>
          <table:table-cell table:style-name="ce12"/>
          <table:table-cell table:style-name="ce16" office:value-type="string" calcext:value-type="string">
            <text:p><text:a xlink:href="https://www.google.com/search?q=Basic+3D+Print+telefone&amp;sca_esv=d7a897ae2fa4bc83&amp;rlz=1C1PNFE_enBR1221&amp;biw=1366&amp;bih=641&amp;sxsrf=APpeQnujWkWU1C9qcalVgG9zYubzq14YHQ%3A1783456446500&amp;ei=vmJNasvaHdHf5NoPtJbfqQI&amp;ved=0ahUKEwjLsdz_tMGVAxXRL1kFHTTLNyUQ4dUDCBA&amp;uact=5&amp;oq=Basic+3D+Print+telefone&amp;gs_lp=Egxnd3Mtd2l6LXNlcnAiF0Jhc2ljIDNEIFByaW50IHRlbGVmb25lMgUQIRigAUjZGVAAWKUXcAF4AZABAJgB1wGgAbINqgEFMC44LjK4AQPIAQD4AQH4AQKYAgugAucPqAIUwgIHECMY6gIYJ8ICEBAuGAMYjwEY6gIYtALYAQHCAhAQABgDGI8BGOoCGLQC2AEBwgIOEC4YgAQYxwEYrwEYjgXCAgYQABgWGB7CAgcQABiABBgTwgIIEAAYFhgeGBPCAggQABiABBiiBMICBRAAGO8FwgIEECEYFZgDR_EF6tnyGya_1oy6BgYIARABGAqSBwUxLjYuNKAHriGyBwUwLjYuNLgHnw_CBwkyLTEuNy4yLjHIB90BgAgB&amp;sclient=gws-wiz-serp#" xlink:type="simple">(34) 99162-8381</text:a> </text:p>
          </table:table-cell>
          <table:table-cell/>
          <table:table-cell table:style-name="ce12" table:number-columns-repeated="1636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yvin Plásticos e Derivados</text:p>
          </table:table-cell>
          <table:table-cell office:value-type="string" calcext:value-type="string">
            <text:p>Transformação plástica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beraba (maior de plásticos da cidade)</text:p>
          </table:table-cell>
          <table:table-cell office:value-type="string" calcext:value-type="string">
            <text:p>Plásticos e derivados</text:p>
          </table:table-cell>
          <table:table-cell office:value-type="string" calcext:value-type="string">
            <text:p>Ferramental e peças usinadas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sita técnica + amostra usinada</text:p>
          </table:table-cell>
          <table:table-cell office:value-type="string" calcext:value-type="string">
            <text:p>Ferramentaria regional com frete baixo</text:p>
          </table:table-cell>
          <table:table-cell office:value-type="string" calcext:value-type="string">
            <text:p><text:a xlink:href="https://www.google.com/search?q=Polyvin+Plásticos+e+Derivados+telefone&amp;sca_esv=d7a897ae2fa4bc83&amp;rlz=1C1PNFE_enBR1221&amp;biw=1366&amp;bih=641&amp;sxsrf=APpeQnvq9q9liqrex7ojGHCD8N7DLfvrkw%3A1783456484070&amp;ei=5GJNaq3xA7HR5NoP9d2coQo&amp;ved=0ahUKEwit89GRtcGVAxWxKFkFHfUuJ6QQ4dUDCBA&amp;uact=5&amp;oq=Polyvin+Plásticos+e+Derivados+telefone&amp;gs_lp=Egxnd3Mtd2l6LXNlcnAiJ1BvbHl2aW4gUGzDoXN0aWNvcyBlIERlcml2YWRvcyB0ZWxlZm9uZTIFECEYoAEyBRAhGKABMgUQIRigAUjZHlCaCVjdHHACeACQAQCYAeMBoAGWD6oBBTAuNS41uAEDyAEA-AEB-AECmAIMoALpEagCFMICCBAAGO8FGLADwgILEAAYgAQYogQYsAPCAgcQIxjqAhgnwgIQEC4YAxiPARjqAhi0AtgBAcICEBAAGAMYjwEY6gIYtALYAQHCAgsQLhiABBjHARivAcICBRAAGIAEwgIGEAAYFhgewgIIEAAYgAQYogTCAgUQABjvBcICDRAuGIAEGA0YxwEYrwHCAggQABiJBRiiBJgDSvEFMYF8TO05-72IBgGQBgS6BgYIARABGAqSBwUyLjQuNqAH1S6yBwUwLjQuNrgHiBHCBwczLTkuMi4xyAflAYAIAQ&amp;sclient=gws-wiz-serp#" xlink:type="simple">(34) 3319-1700</text:a> </text:p>
          </table:table-cell>
          <table:table-cell table:style-name="ce16" office:value-type="string" calcext:value-type="string">
            <text:p><text:a xlink:href="https://www.google.com/search?q=Polyvin+Plásticos+e+Derivados+telefone&amp;sca_esv=d7a897ae2fa4bc83&amp;rlz=1C1PNFE_enBR1221&amp;biw=1366&amp;bih=641&amp;sxsrf=APpeQnvq9q9liqrex7ojGHCD8N7DLfvrkw%3A1783456484070&amp;ei=5GJNaq3xA7HR5NoP9d2coQo&amp;ved=0ahUKEwit89GRtcGVAxWxKFkFHfUuJ6QQ4dUDCBA&amp;uact=5&amp;oq=Polyvin+Plásticos+e+Derivados+telefone&amp;gs_lp=Egxnd3Mtd2l6LXNlcnAiJ1BvbHl2aW4gUGzDoXN0aWNvcyBlIERlcml2YWRvcyB0ZWxlZm9uZTIFECEYoAEyBRAhGKABMgUQIRigAUjZHlCaCVjdHHACeACQAQCYAeMBoAGWD6oBBTAuNS41uAEDyAEA-AEB-AECmAIMoALpEagCFMICCBAAGO8FGLADwgILEAAYgAQYogQYsAPCAgcQIxjqAhgnwgIQEC4YAxiPARjqAhi0AtgBAcICEBAAGAMYjwEY6gIYtALYAQHCAgsQLhiABBjHARivAcICBRAAGIAEwgIGEAAYFhgewgIIEAAYgAQYogTCAgUQABjvBcICDRAuGIAEGA0YxwEYrwHCAggQABiJBRiiBJgDSvEFMYF8TO05-72IBgGQBgS6BgYIARABGAqSBwUyLjQuNqAH1S6yBwUwLjQuNrgHiBHCBwczLTkuMi4xyAflAYAIAQ&amp;sclient=gws-wiz-serp#" xlink:type="simple">0800 34 3535</text:a> </text:p>
          </table:table-cell>
          <table:table-cell/>
          <table:table-cell table:style-name="ce12" table:number-columns-repeated="1636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UDI Fibras Ind. e Com.</text:p>
          </table:table-cell>
          <table:table-cell office:value-type="string" calcext:value-type="string">
            <text:p>Transformação plástica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14.071.808/0001-74</text:p>
          </table:table-cell>
          <table:table-cell office:value-type="string" calcext:value-type="string">
            <text:p>Rua José Rodrigues 65, Distrito Industrial</text:p>
          </table:table-cell>
          <table:table-cell office:value-type="string" calcext:value-type="string">
            <text:p>Artefatos em fibra/plástico p/ construção</text:p>
          </table:table-cell>
          <table:table-cell office:value-type="string" calcext:value-type="string">
            <text:p>Moldes e gabaritos p/ laminação, peças usinadas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sita técnica + amostra usinada</text:p>
          </table:table-cell>
          <table:table-cell office:value-type="string" calcext:value-type="string">
            <text:p>Moldes-padrão p/ fibra com precisão CNC</text:p>
          </table:table-cell>
          <table:table-cell table:style-name="ce12"/>
          <table:table-cell table:style-name="ce16" office:value-type="string" calcext:value-type="string">
            <text:p><text:a xlink:href="https://www.google.com/search?q=UDI+Fibras+Ind.+e+Com.+telefone&amp;sca_esv=d7a897ae2fa4bc83&amp;rlz=1C1PNFE_enBR1221&amp;biw=1366&amp;bih=641&amp;sxsrf=APpeQnsxN9wy3YytdZkb1-5uO55BXHGChw%3A1783456508529&amp;ei=_GJNat7oH9rW5NoP563z8QU&amp;ved=0ahUKEwje1qadtcGVAxVaK1kFHefWPF4Q4dUDCBA&amp;uact=5&amp;oq=UDI+Fibras+Ind.+e+Com.+telefone&amp;gs_lp=Egxnd3Mtd2l6LXNlcnAiH1VESSBGaWJyYXMgSW5kLiBlIENvbS4gdGVsZWZvbmUyBRAhGKABSL0hUABYliBwAXgBkAEAmAHcAaABlQ6qAQUwLjYuNLgBA8gBAPgBAfgBApgCC6ACzRCoAhTCAgcQIxjqAhgnwgIQEAAYAxiPARjqAhi0AtgBAcICEBAuGAMYjwEY6gIYtALYAQHCAgUQIRifBcICBBAhGBWYA0DxBQZNoMdf1EIBugYGCAEQARgKkgcFMS41LjWgB-0ZsgcFMC41LjW4B4wQwgcJMi0zLjUuMi4xyAe4AYAIAQ&amp;sclient=gws-wiz-serp#" xlink:type="simple">(34) 99681-7056</text:a> </text:p>
          </table:table-cell>
          <table:table-cell/>
          <table:table-cell table:style-name="ce12" table:number-columns-repeated="1636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Uberflex Ind. e Com. de Plásticos</text:p>
          </table:table-cell>
          <table:table-cell office:value-type="string" calcext:value-type="string">
            <text:p>Transformação plástica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beraba (enriquecer contato)</text:p>
          </table:table-cell>
          <table:table-cell office:value-type="string" calcext:value-type="string">
            <text:p>Tubos e acessórios plásticos p/ construção</text:p>
          </table:table-cell>
          <table:table-cell office:value-type="string" calcext:value-type="string">
            <text:p>Matrizes de extrusão, calibradores usinados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sita técnica + amostra usinada</text:p>
          </table:table-cell>
          <table:table-cell office:value-type="string" calcext:value-type="string">
            <text:p>Calibradores e matrizes com entrega regional</text:p>
          </table:table-cell>
          <table:table-cell table:style-name="ce12" office:value-type="float" office:value="3432155166" calcext:value-type="float">
            <text:p>3432155166</text:p>
          </table:table-cell>
          <table:table-cell office:value-type="float" office:value="3488379091" calcext:value-type="float">
            <text:p>3488379091</text:p>
          </table:table-cell>
          <table:table-cell/>
          <table:table-cell table:style-name="ce12" table:number-columns-repeated="1636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M Máquinas</text:p>
          </table:table-cell>
          <table:table-cell office:value-type="string" calcext:value-type="string">
            <text:p>Metalmecânica e agro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tmmaquinas.ind.br (25+ anos)</text:p>
          </table:table-cell>
          <table:table-cell office:value-type="string" calcext:value-type="string">
            <text:p>Máquinas e equipamentos</text:p>
          </table:table-cell>
          <table:table-cell office:value-type="string" calcext:value-type="string">
            <text:p>Usinagem terceirizada (overflow), buchas e peças em PEAD p/ máquinas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rceria de capacidade (overflow)</text:p>
          </table:table-cell>
          <table:table-cell office:value-type="string" calcext:value-type="string">
            <text:p>Capacidade extra de usinagem de precisão nos picos</text:p>
          </table:table-cell>
          <table:table-cell office:value-type="string" calcext:value-type="string">
            <text:p>(34) 3215-3288 </text:p>
          </table:table-cell>
          <table:table-cell table:style-name="ce17" office:value-type="string" calcext:value-type="string">
            <text:p>(34) 99181-7380 </text:p>
          </table:table-cell>
          <table:table-cell/>
          <table:table-cell table:style-name="ce12" table:number-columns-repeated="1636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errano Implementos Agrícolas</text:p>
          </table:table-cell>
          <table:table-cell office:value-type="string" calcext:value-type="string">
            <text:p>Metalmecânica e agro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berlândia (enriquecer contato)</text:p>
          </table:table-cell>
          <table:table-cell office:value-type="string" calcext:value-type="string">
            <text:p>Implementos agrícolas</text:p>
          </table:table-cell>
          <table:table-cell office:value-type="string" calcext:value-type="string">
            <text:p>Buchas, roletes e deslizantes em PEAD; usinagem de precisão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rceria de capacidade (overflow)</text:p>
          </table:table-cell>
          <table:table-cell office:value-type="string" calcext:value-type="string">
            <text:p>PEAD substitui bronze em buchas de implemento</text:p>
          </table:table-cell>
          <table:table-cell table:style-name="ce12"/>
          <table:table-cell table:style-name="ce16" office:value-type="string" calcext:value-type="string">
            <text:p>(34) 98827-9134. </text:p>
          </table:table-cell>
          <table:table-cell/>
          <table:table-cell table:style-name="ce12" table:number-columns-repeated="1636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Indústrias Suavetex</text:p>
          </table:table-cell>
          <table:table-cell office:value-type="string" calcext:value-type="string">
            <text:p>Cosméticos e higiene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berlândia (enriquecer contato)</text:p>
          </table:table-cell>
          <table:table-cell office:value-type="string" calcext:value-type="string">
            <text:p>Higiene pessoal (uma das maiores do setor na cidade)</text:p>
          </table:table-cell>
          <table:table-cell office:value-type="string" calcext:value-type="string">
            <text:p>Peças de máquina de conversão, guias e formatos em PEAD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-mail + WhatsApp + visita produção</text:p>
          </table:table-cell>
          <table:table-cell office:value-type="string" calcext:value-type="string">
            <text:p>Reposição de peças de linha sem importação</text:p>
          </table:table-cell>
          <table:table-cell office:value-type="string" calcext:value-type="string">
            <text:p><text:a xlink:href="https://www.google.com/search?q=Indústrias+Suavetex+telefone&amp;sca_esv=d7a897ae2fa4bc83&amp;rlz=1C1PNFE_enBR1221&amp;biw=1366&amp;bih=641&amp;sxsrf=APpeQnsUczP3N6K6cSPdV7805QQDJKY6zA%3A1783457578434&amp;ei=KmdNavyMGujK1sQPktS-uAU&amp;ved=0ahUKEwj8ybybucGVAxVopZUCHRKqD1cQ4dUDCBA&amp;uact=5&amp;oq=Indústrias+Suavetex+telefone&amp;gs_lp=Egxnd3Mtd2l6LXNlcnAiHUluZMO6c3RyaWFzIFN1YXZldGV4IHRlbGVmb25lMgUQIRigAUjF4gNQAFiO4QNwBXgAkAEAmAHvAaAB6xCqAQYwLjEwLjK4AQPIAQD4AQH4AQKYAhGgAsgUqAIUwgIHECMY6gIYJ8ICEBAAGAMYjwEY6gIYtALYAQHCAg4QLhiABBjHARivARiOBcICBRAAGIAEwgIGEAAYFhgewgICECbCAgUQABjvBcICEBAuGIAEGA0YxwEYrwEYjgXCAgcQABiABBgNwgIGEAAYHhgNmANE8QUvpn-YoJq8UboGBggBEAEYCpIHBTUuNi42oAfFKLIHBTAuNi42uAeaE8IHCDMtMTIuNC4xyAekAoAIAQ&amp;sclient=gws-wiz-serp#" xlink:type="simple">(34) 3292-6500</text:a> </text:p>
          </table:table-cell>
          <table:table-cell table:number-columns-repeated="2"/>
          <table:table-cell table:style-name="ce12" table:number-columns-repeated="1636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riare Cosméticos Ind. e Com.</text:p>
          </table:table-cell>
          <table:table-cell office:value-type="string" calcext:value-type="string">
            <text:p>Cosméticos e higiene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43.299.998/0001-80</text:p>
          </table:table-cell>
          <table:table-cell office:value-type="string" calcext:value-type="string">
            <text:p>Rua José Rezende 5731, Tibery</text:p>
          </table:table-cell>
          <table:table-cell office:value-type="string" calcext:value-type="string">
            <text:p>Cosméticos, perfumaria e higiene (2021)</text:p>
          </table:table-cell>
          <table:table-cell office:value-type="string" calcext:value-type="string">
            <text:p>Peças de envase, gabaritos de rotulagem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-mail + WhatsApp + visita produção</text:p>
          </table:table-cell>
          <table:table-cell office:value-type="string" calcext:value-type="string">
            <text:p>Empresa jovem montando linha: peças sob medida desde o início</text:p>
          </table:table-cell>
          <table:table-cell office:value-type="string" calcext:value-type="string">
            <text:p><text:a xlink:href="https://www.google.com/search?q=Criare+Cosméticos+Ind.+e+Com.+telefone&amp;sca_esv=d7a897ae2fa4bc83&amp;rlz=1C1PNFE_enBR1221&amp;biw=1366&amp;bih=641&amp;sxsrf=APpeQnvXlYtHECwXHu_Pr7zaRuUGgBd7Wg%3A1783457687205&amp;ei=l2dNaoaSDJKf5OUPsPW00QE&amp;ved=0ahUKEwjGuavPucGVAxWSD7kGHbA6LRoQ4dUDCBA&amp;uact=5&amp;oq=Criare+Cosméticos+Ind.+e+Com.+telefone&amp;gs_lp=Egxnd3Mtd2l6LXNlcnAiJ0NyaWFyZSBDb3Ntw6l0aWNvcyBJbmQuIGUgQ29tLiB0ZWxlZm9uZTIFECEYoAEyBRAhGKABSPFKUL0JWO9IcAZ4AZABAJgBqQKgAbcXqgEFMC41Ljm4AQPIAQD4AQH4AQKYAhSgAscbqAIUwgIKEAAYRxjWBBiwA8ICBxAjGOoCGCfCAhAQLhgDGI8BGOoCGLQC2AEBwgIQEAAYAxiPARjqAhi0AtgBAcICBRAhGJ8FwgIEECEYFcICBxAhGAoYoAGYA0bxBRnR8dPToX_SiAYBkAYIugYGCAEQARgKkgcINi4xLjEyLjGgB98tsgcIMC4xLjEyLjG4B40awgcKMi0yLjEzLjMuMsgHzgKACAE&amp;sclient=gws-wiz-serp#" xlink:type="simple">(34) 3235-0921</text:a> </text:p>
          </table:table-cell>
          <table:table-cell table:number-columns-repeated="2"/>
          <table:table-cell table:style-name="ce12" table:number-columns-repeated="1636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Grind Plastic</text:p>
          </table:table-cell>
          <table:table-cell office:value-type="string" calcext:value-type="string">
            <text:p>Transformação plástica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beraba (enriquecer contato)</text:p>
          </table:table-cell>
          <table:table-cell office:value-type="string" calcext:value-type="string">
            <text:p>Artefatos plásticos (pequeno porte)</text:p>
          </table:table-cell>
          <table:table-cell office:value-type="string" calcext:value-type="string">
            <text:p>Molde acessível em alumínio p/ pequenas séri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sita técnica + amostra usinada</text:p>
          </table:table-cell>
          <table:table-cell office:value-type="string" calcext:value-type="string">
            <text:p>Molde de alumínio viabiliza produto que o aço inviabiliza</text:p>
          </table:table-cell>
          <table:table-cell office:value-type="string" calcext:value-type="string">
            <text:p>(11) 3456-7890 </text:p>
          </table:table-cell>
          <table:table-cell table:style-name="ce16" office:value-type="string" calcext:value-type="string">
            <text:p>(11) 93456-7890 </text:p>
          </table:table-cell>
          <table:table-cell/>
          <table:table-cell table:style-name="ce12" table:number-columns-repeated="1636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Química Estrela</text:p>
          </table:table-cell>
          <table:table-cell office:value-type="string" calcext:value-type="string">
            <text:p>Química e saneantes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Distrito Industrial - quimicaestrela.com.br</text:p>
          </table:table-cell>
          <table:table-cell office:value-type="string" calcext:value-type="string">
            <text:p>Soda cáustica e produtos de limpeza</text:p>
          </table:table-cell>
          <table:table-cell office:value-type="string" calcext:value-type="string">
            <text:p>Peças resistentes a corrosão em PEAD p/ linh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-mail + WhatsApp + visita produção</text:p>
          </table:table-cell>
          <table:table-cell office:value-type="string" calcext:value-type="string">
            <text:p>PEAD não corrói: reposição p/ ambiente cáustico</text:p>
          </table:table-cell>
          <table:table-cell office:value-type="string" calcext:value-type="string">
            <text:p>(34) 3213-1388 </text:p>
          </table:table-cell>
          <table:table-cell table:number-columns-repeated="2"/>
          <table:table-cell table:style-name="ce12" table:number-columns-repeated="1636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igor Alimentos</text:p>
          </table:table-cell>
          <table:table-cell office:value-type="string" calcext:value-type="string">
            <text:p>Alimentos e bebidas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Distrito Industrial</text:p>
          </table:table-cell>
          <table:table-cell office:value-type="string" calcext:value-type="string">
            <text:p>Laticínios</text:p>
          </table:table-cell>
          <table:table-cell office:value-type="string" calcext:value-type="string">
            <text:p>Peças de desgaste em PEAD alimentício p/ linhas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dastro fornecedor + visita PCM</text:p>
          </table:table-cell>
          <table:table-cell office:value-type="string" calcext:value-type="string">
            <text:p>Guias e raspadores locais em 48h</text:p>
          </table:table-cell>
          <table:table-cell office:value-type="string" calcext:value-type="string">
            <text:p>0800-724-6433 </text:p>
          </table:table-cell>
          <table:table-cell table:number-columns-repeated="2"/>
          <table:table-cell table:style-name="ce12" table:number-columns-repeated="16365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Complastec Plásticos Técnicos</text:p>
          </table:table-cell>
          <table:table-cell office:value-type="string" calcext:value-type="string">
            <text:p>Transformação plástica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Av. Antônio Tomaz F. de Rezende 1380, N. Sra. das Graças</text:p>
          </table:table-cell>
          <table:table-cell office:value-type="string" calcext:value-type="string">
            <text:p>Plásticos técnicos (ATENÇÃO: pode ser concorrente parcial em usinagem)</text:p>
          </table:table-cell>
          <table:table-cell office:value-type="string" calcext:value-type="string">
            <text:p>Subcontratação mútua; moldes que eles não fazem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rceria de capacidade (overflow)</text:p>
          </table:table-cell>
          <table:table-cell office:value-type="string" calcext:value-type="string">
            <text:p>Validar sobreposição antes; propor parceria, não venda</text:p>
          </table:table-cell>
          <table:table-cell office:value-type="string" calcext:value-type="string">
            <text:p><text:a xlink:href="https://www.google.com/search?q=Complastec+Plásticos+Técnicos+telefone&amp;sca_esv=d7a897ae2fa4bc83&amp;rlz=1C1PNFE_enBR1221&amp;biw=1366&amp;bih=641&amp;sxsrf=APpeQnu2RbGA-T_UVVOcx4TL_13pKe62uQ%3A1783457862354&amp;ei=RmhNar-XFb-AhuMPt7qfmAE&amp;ved=0ahUKEwi_0u2iusGVAxU_gGEGHTfdBxMQ4dUDCBA&amp;uact=5&amp;oq=Complastec+Plásticos+Técnicos+telefone&amp;gs_lp=Egxnd3Mtd2l6LXNlcnAiKENvbXBsYXN0ZWMgUGzDoXN0aWNvcyBUw6ljbmljb3MgdGVsZWZvbmUyBRAhGKABMgUQIRigATIFECEYoAFIyBRQ5ANYpBNwAHgCkAEAmAGxCKAB3xKqAQc1LTEuMS4xuAEDyAEA-AEBmAIDoAK5DcICBBAAGEeYAwCIBgGQBgSSBwkxLjQtMS43LTGgB7kIsgcHNC0xLjctMbgHjQ3CBwUzLTEuMsgHRYAIAQ&amp;sclient=gws-wiz-serp#" xlink:type="simple">(34) 3232-3212</text:a> </text:p>
          </table:table-cell>
          <table:table-cell table:style-name="ce16" office:value-type="string" calcext:value-type="string">
            <text:p><text:a xlink:href="https://www.google.com/search?q=Complastec+Plásticos+Técnicos+telefone&amp;sca_esv=d7a897ae2fa4bc83&amp;rlz=1C1PNFE_enBR1221&amp;biw=1366&amp;bih=641&amp;sxsrf=APpeQnu2RbGA-T_UVVOcx4TL_13pKe62uQ%3A1783457862354&amp;ei=RmhNar-XFb-AhuMPt7qfmAE&amp;ved=0ahUKEwi_0u2iusGVAxU_gGEGHTfdBxMQ4dUDCBA&amp;uact=5&amp;oq=Complastec+Plásticos+Técnicos+telefone&amp;gs_lp=Egxnd3Mtd2l6LXNlcnAiKENvbXBsYXN0ZWMgUGzDoXN0aWNvcyBUw6ljbmljb3MgdGVsZWZvbmUyBRAhGKABMgUQIRigATIFECEYoAFIyBRQ5ANYpBNwAHgCkAEAmAGxCKAB3xKqAQc1LTEuMS4xuAEDyAEA-AEBmAIDoAK5DcICBBAAGEeYAwCIBgGQBgSSBwkxLjQtMS43LTGgB7kIsgcHNC0xLjctMbgHjQ3CBwUzLTEuMsgHRYAIAQ&amp;sclient=gws-wiz-serp#" xlink:type="simple">(34) 99152-1615</text:a> </text:p>
          </table:table-cell>
          <table:table-cell/>
          <table:table-cell table:style-name="ce12" table:number-columns-repeated="16365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Lactalis (unidade queijos)</text:p>
          </table:table-cell>
          <table:table-cell office:value-type="string" calcext:value-type="string">
            <text:p>Alimentos e bebidas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berlândia (em expansão até 2027)</text:p>
          </table:table-cell>
          <table:table-cell office:value-type="string" calcext:value-type="string">
            <text:p>Queijos (1.000 t/mês)</text:p>
          </table:table-cell>
          <table:table-cell office:value-type="string" calcext:value-type="string">
            <text:p>Peças em PEAD alimentício p/ novas linhas em instalação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dastro fornecedor + visita PCM</text:p>
          </table:table-cell>
          <table:table-cell office:value-type="string" calcext:value-type="string">
            <text:p>Expansão = homologação de fornecedores agora</text:p>
          </table:table-cell>
          <table:table-cell table:style-name="ce17" office:value-type="string" calcext:value-type="string">
            <text:p>(47) 3406-9339. [<text:a xlink:href="https://cnpja.com/office/14049467009430" xlink:type="simple">1</text:a>] </text:p>
          </table:table-cell>
          <table:table-cell office:value-type="string" calcext:value-type="string">
            <text:p>https://portalfornecedor.grupolactalis.com.br/portalfornecedor/#/RouteLogin</text:p>
          </table:table-cell>
          <table:table-cell/>
          <table:table-cell table:style-name="ce12" table:number-columns-repeated="1636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elplus</text:p>
          </table:table-cell>
          <table:table-cell office:value-type="string" calcext:value-type="string">
            <text:p>Cosméticos e higiene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berlândia (enriquecer contato)</text:p>
          </table:table-cell>
          <table:table-cell office:value-type="string" calcext:value-type="string">
            <text:p>Cosméticos (uma das maiores do setor na cidade)</text:p>
          </table:table-cell>
          <table:table-cell office:value-type="string" calcext:value-type="string">
            <text:p>Peças de envase e gabaritos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-mail + WhatsApp + visita produção</text:p>
          </table:table-cell>
          <table:table-cell office:value-type="string" calcext:value-type="string">
            <text:p>Troca rápida de formato de frasco</text:p>
          </table:table-cell>
          <table:table-cell office:value-type="string" calcext:value-type="string">
            <text:p>(34) 3236-9899 </text:p>
          </table:table-cell>
          <table:table-cell table:number-columns-repeated="2"/>
          <table:table-cell table:style-name="ce12" table:number-columns-repeated="1636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afe Ind. e Com.</text:p>
          </table:table-cell>
          <table:table-cell office:value-type="string" calcext:value-type="string">
            <text:p>Transformação plástica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beraba (enriquecer contato)</text:p>
          </table:table-cell>
          <table:table-cell office:value-type="string" calcext:value-type="string">
            <text:p>Artefatos plásticos (pequeno porte)</text:p>
          </table:table-cell>
          <table:table-cell office:value-type="string" calcext:value-type="string">
            <text:p>Ferramental de baixo custo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sita técnica + amostra usinada</text:p>
          </table:table-cell>
          <table:table-cell office:value-type="string" calcext:value-type="string">
            <text:p>Molde acessível p/ pequenas séries</text:p>
          </table:table-cell>
          <table:table-cell table:style-name="ce18" office:value-type="string" calcext:value-type="string">
            <text:p>34 3313-8100 </text:p>
          </table:table-cell>
          <table:table-cell table:number-columns-repeated="2"/>
          <table:table-cell table:style-name="ce12" table:number-columns-repeated="1636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assouras Radial</text:p>
          </table:table-cell>
          <table:table-cell office:value-type="string" calcext:value-type="string">
            <text:p>Utilidades domésticas</text:p>
          </table:table-cell>
          <table:table-cell office:value-type="string" calcext:value-type="string">
            <text:p>MG (confirmar cidade)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vassourasradial.com.br</text:p>
          </table:table-cell>
          <table:table-cell office:value-type="string" calcext:value-type="string">
            <text:p>Vassouras, rodos, escovas e pás</text:p>
          </table:table-cell>
          <table:table-cell office:value-type="string" calcext:value-type="string">
            <text:p>Moldes p/ cabos, suportes e cepas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sita técnica + amostra usinada</text:p>
          </table:table-cell>
          <table:table-cell office:value-type="string" calcext:value-type="string">
            <text:p>Confirmar sede antes; mesmo gancho da Mendonça</text:p>
          </table:table-cell>
          <table:table-cell office:value-type="string" calcext:value-type="string">
            <text:p><text:a xlink:href="https://www.google.com/search?q=Vassouras+Radial+telefone&amp;sca_esv=d7a897ae2fa4bc83&amp;rlz=1C1PNFE_enBR1221&amp;biw=1366&amp;bih=641&amp;sxsrf=APpeQnuqJzWDln_56HniFxVIIB7bF-WWbg%3A1783458068510&amp;ei=FGlNarHYHu2H5OUPqrXOiAw&amp;ved=0ahUKEwixspSFu8GVAxXtA7kGHaqaE8EQ4dUDCBA&amp;uact=5&amp;oq=Vassouras+Radial+telefone&amp;gs_lp=Egxnd3Mtd2l6LXNlcnAiGVZhc3NvdXJhcyBSYWRpYWwgdGVsZWZvbmUyBRAhGKABMgUQIRigATIFECEYoAEyBRAhGJ8FMgUQIRifBTIFECEYnwVIwA5QAFiiDXABeAGQAQCYAYQCoAHSDqoBBTAuMy42uAEDyAEA-AEB-AECmAIKoAKOEagCFMICBxAjGOoCGCfCAg0QIxjwBRieBhjqAhgnwgIQEAAYAxiPARjqAhi0AtgBAcICCxAuGK8BGMcBGIAEwgIGEAAYFhgewgILEC4YgAQYxwEYrwGYAzjxBT-dHzMzmLrRugYGCAEQARgKkgcFMS4yLjegB_kmsgcFMC4yLje4B9UQwgcHMy01LjQuMcgH2wGACAE&amp;sclient=gws-wiz-serp#" xlink:type="simple">(37) 3351-1530</text:a> </text:p>
          </table:table-cell>
          <table:table-cell table:number-columns-repeated="2"/>
          <table:table-cell table:style-name="ce12" table:number-columns-repeated="1636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evalor Reciclagem e Embalagens</text:p>
          </table:table-cell>
          <table:table-cell office:value-type="string" calcext:value-type="string">
            <text:p>Transformação plástica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37.421.026/0001-13</text:p>
          </table:table-cell>
          <table:table-cell office:value-type="string" calcext:value-type="string">
            <text:p>Rua Rafael L. X. Santos 219, Distrito Industrial</text:p>
          </table:table-cell>
          <table:table-cell office:value-type="string" calcext:value-type="string">
            <text:p>Reciclagem e embalagens</text:p>
          </table:table-cell>
          <table:table-cell office:value-type="string" calcext:value-type="string">
            <text:p>Peças de reposição p/ extrusoras e aglutinadores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Visita técnica + amostra usinada</text:p>
          </table:table-cell>
          <table:table-cell office:value-type="string" calcext:value-type="string">
            <text:p>Manutenção de peças de máquina de reciclagem</text:p>
          </table:table-cell>
          <table:table-cell office:value-type="string" calcext:value-type="string">
            <text:p><text:a xlink:href="https://www.google.com/search?q=Revalor+Reciclagem+e+Embalagens+telefone&amp;sca_esv=d7a897ae2fa4bc83&amp;rlz=1C1PNFE_enBR1221&amp;biw=1366&amp;bih=641&amp;sxsrf=APpeQnt2pFrBMGgg3xqlLKs4zWpbv3xWjQ%3A1783458116439&amp;ei=RGlNapaqGs2A5OUPz7qasQw&amp;ved=0ahUKEwiW3IGcu8GVAxVNALkGHU-dJsYQ4dUDCBA&amp;uact=5&amp;oq=Revalor+Reciclagem+e+Embalagens+telefone&amp;gs_lp=Egxnd3Mtd2l6LXNlcnAiKFJldmFsb3IgUmVjaWNsYWdlbSBlIEVtYmFsYWdlbnMgdGVsZWZvbmUyBRAhGKABMgUQIRigAUiFFFAAWMwScAF4AZABAJgB2gGgAYwOqgEFMC44LjK4AQPIAQD4AQH4AQKYAgugApQQqAIUwgIHECMY6gIYJ8ICDRAjGJ4GGPAFGOoCGCfCAhAQABgDGI8BGOoCGLQC2AEBwgIQEC4YAxiPARjqAhi0AtgBAcICBhAAGBYYHsICBRAAGO8FwgIIEAAYgAQYogSYAz3xBfLSPm3vCZKpugYGCAEQARgKkgcFMS41LjWgB9cXsgcFMC41LjW4B9cPwgcHMy05LjEuMcgHpQGACAE&amp;sclient=gws-wiz-serp#" xlink:type="simple">(34) 99939-8826</text:a> </text:p>
          </table:table-cell>
          <table:table-cell table:number-columns-repeated="2"/>
          <table:table-cell table:style-name="ce12" table:number-columns-repeated="1636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lastferes</text:p>
          </table:table-cell>
          <table:table-cell office:value-type="string" calcext:value-type="string">
            <text:p>Transformação plástica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Rua Araguari, São Benedito, Uberaba</text:p>
          </table:table-cell>
          <table:table-cell office:value-type="string" calcext:value-type="string">
            <text:p>Embalagens</text:p>
          </table:table-cell>
          <table:table-cell office:value-type="string" calcext:value-type="string">
            <text:p>Ferramental e reposição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Visita técnica + amostra usinada</text:p>
          </table:table-cell>
          <table:table-cell office:value-type="string" calcext:value-type="string">
            <text:p>Ferramentaria regional</text:p>
          </table:table-cell>
          <table:table-cell office:value-type="string" calcext:value-type="string">
            <text:p><text:a xlink:href="https://www.google.com/search?q=Plastferes+telefone&amp;rlz=1C1PNFE_enBR1221&amp;oq=Plastferes+telefone&amp;gs_lcrp=EgZjaHJvbWUyCQgAEEUYORigATIHCAEQIRigATIHCAIQIRigAdIBCDMxMTFqMGo5qAIGsAIB8QWccMfeywBSzg&amp;sourceid=chrome&amp;source=chrome.ob&amp;ie=UTF-8#" xlink:type="simple">(51) 3081-3400</text:a> </text:p>
          </table:table-cell>
          <table:table-cell table:number-columns-repeated="2"/>
          <table:table-cell table:style-name="ce12" table:number-columns-repeated="1636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Interquim</text:p>
          </table:table-cell>
          <table:table-cell office:value-type="string" calcext:value-type="string">
            <text:p>Química e saneantes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terquim.ind.br</text:p>
          </table:table-cell>
          <table:table-cell office:value-type="string" calcext:value-type="string">
            <text:p>Químicos p/ manutenção industrial</text:p>
          </table:table-cell>
          <table:table-cell office:value-type="string" calcext:value-type="string">
            <text:p>Peças de envase; indicação mútua de clientes industriais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E-mail + WhatsApp + visita produção</text:p>
          </table:table-cell>
          <table:table-cell office:value-type="string" calcext:value-type="string">
            <text:p>Atendem as mesmas fábricas: trocar indicações</text:p>
          </table:table-cell>
          <table:table-cell office:value-type="string" calcext:value-type="string">
            <text:p><text:a xlink:href="https://www.google.com/search?q=Interquim+telefone&amp;sca_esv=d7a897ae2fa4bc83&amp;rlz=1C1PNFE_enBR1221&amp;sxsrf=APpeQnvj0F3dX81u9GpCeVYQg1_K4jJihA%3A1783458181578&amp;ei=hWlNaprsIuCm5OUPwLOCqAY&amp;biw=1366&amp;bih=641&amp;ved=0ahUKEwjawom7u8GVAxVgE7kGHcCZAGUQ4dUDCBA&amp;uact=5&amp;oq=Interquim+telefone&amp;gs_lp=Egxnd3Mtd2l6LXNlcnAiEkludGVycXVpbSB0ZWxlZm9uZTIIEAAYFhgeGAoyBhAAGBYYHjIIEAAYgAQYogQyBRAAGO8FMgUQABjvBTIFEAAY7wUyBRAAGO8FSMUnUABY2iZwAXgBkAEAmAHZAaAB-gyqAQUwLjcuMrgBA8gBAPgBAfgBApgCCqAC3Q-oAhTCAgcQIxjqAhgnwgINECMY8AUYngYY6gIYJ8ICEBAAGAMYjwEY6gIYtALYAQHCAgsQLhivARjHARiABMICBRAAGIAEwgIEEAAYHsICBxAAGIAEGBPCAgYQABgeGBPCAggQABgeGBMYCpgDO-IDBRIBMSBA8QU0Owxxi3XgbLoGBggBEAEYCpIHBTEuMC45oAfsL7IHAzItObgHoQ_CBwU0LTkuMcgHqgKACAE&amp;sclient=gws-wiz-serp#" xlink:type="simple">(47) 3334-6898</text:a> </text:p>
          </table:table-cell>
          <table:table-cell table:style-name="ce16" office:value-type="string" calcext:value-type="string">
            <text:p>(47) 99977-5992 </text:p>
          </table:table-cell>
          <table:table-cell/>
          <table:table-cell table:style-name="ce12" table:number-columns-repeated="1636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Cargill (unidade Uberlândia)</text:p>
          </table:table-cell>
          <table:table-cell office:value-type="string" calcext:value-type="string">
            <text:p>Alimentos e bebidas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Distrito Industrial</text:p>
          </table:table-cell>
          <table:table-cell office:value-type="string" calcext:value-type="string">
            <text:p>Alimentos/ingredientes</text:p>
          </table:table-cell>
          <table:table-cell office:value-type="string" calcext:value-type="string">
            <text:p>Peças de desgaste em PEAD (compras corporativas — ciclo longo)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Cadastro fornecedor + visita PCM</text:p>
          </table:table-cell>
          <table:table-cell office:value-type="string" calcext:value-type="string">
            <text:p>Entrar via cadastro de fornecedor local homologado</text:p>
          </table:table-cell>
          <table:table-cell office:value-type="string" calcext:value-type="string">
            <text:p>(34) 3218-4900 </text:p>
          </table:table-cell>
          <table:table-cell table:style-name="ce16" office:value-type="string" calcext:value-type="string">
            <text:p>(34) 2589-1100 </text:p>
          </table:table-cell>
          <table:table-cell/>
          <table:table-cell table:style-name="ce12" table:number-columns-repeated="1636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ATT Perfumaria e Cosméticos</text:p>
          </table:table-cell>
          <table:table-cell office:value-type="string" calcext:value-type="string">
            <text:p>Cosméticos e higiene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berlândia (enriquecer contato)</text:p>
          </table:table-cell>
          <table:table-cell office:value-type="string" calcext:value-type="string">
            <text:p>Perfumaria e cosméticos</text:p>
          </table:table-cell>
          <table:table-cell office:value-type="string" calcext:value-type="string">
            <text:p>Peças de envase e gabaritos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E-mail + WhatsApp + visita produção</text:p>
          </table:table-cell>
          <table:table-cell office:value-type="string" calcext:value-type="string">
            <text:p>Peças sob medida p/ frascos especiais</text:p>
          </table:table-cell>
          <table:table-cell office:value-type="string" calcext:value-type="string">
            <text:p>(34) 3293-0020 </text:p>
          </table:table-cell>
          <table:table-cell table:style-name="ce16" office:value-type="string" calcext:value-type="string">
            <text:p>(34) 3211-0562 </text:p>
          </table:table-cell>
          <table:table-cell/>
          <table:table-cell table:style-name="ce12" table:number-columns-repeated="1636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erpétua Cosméticos</text:p>
          </table:table-cell>
          <table:table-cell office:value-type="string" calcext:value-type="string">
            <text:p>Cosméticos e higiene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acebook: perpetuacosmeticos</text:p>
          </table:table-cell>
          <table:table-cell office:value-type="string" calcext:value-type="string">
            <text:p>Cosméticos (pequeno porte)</text:p>
          </table:table-cell>
          <table:table-cell office:value-type="string" calcext:value-type="string">
            <text:p>Peças de envase básicas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E-mail + WhatsApp + visita produção</text:p>
          </table:table-cell>
          <table:table-cell office:value-type="string" calcext:value-type="string">
            <text:p>Acesso fácil ao dono via redes sociais</text:p>
          </table:table-cell>
          <table:table-cell office:value-type="string" calcext:value-type="string">
            <text:p> (34) 99775-7700 </text:p>
          </table:table-cell>
          <table:table-cell table:number-columns-repeated="2"/>
          <table:table-cell table:style-name="ce12" table:number-columns-repeated="1636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Embalagens Uberlândia (Embalagens UDI)</text:p>
          </table:table-cell>
          <table:table-cell office:value-type="string" calcext:value-type="string">
            <text:p>Canal indireto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embalagensuberlandia.com.br (29 anos)</text:p>
          </table:table-cell>
          <table:table-cell office:value-type="string" calcext:value-type="string">
            <text:p>Distribuidor de frascos p/ cosméticos e manipulação</text:p>
          </table:table-cell>
          <table:table-cell office:value-type="string" calcext:value-type="string">
            <text:p>Canal: clientes que querem frasco exclusivo precisam de molde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Parceria de indicação</text:p>
          </table:table-cell>
          <table:table-cell office:value-type="string" calcext:value-type="string">
            <text:p>Comissão por indicação de projeto de frasco próprio</text:p>
          </table:table-cell>
          <table:table-cell office:value-type="string" calcext:value-type="string">
            <text:p><text:a xlink:href="https://www.google.com/search?q=Embalagens+Uberlândia+%28Embalagens+UDI%29+telefone&amp;sca_esv=d7a897ae2fa4bc83&amp;rlz=1C1PNFE_enBR1221&amp;biw=1366&amp;bih=641&amp;sxsrf=APpeQnsHNcq2dxTKPgbUH4UKB4CXb1geSA%3A1783458446580&amp;ei=jmpNaoz4IpOB5OUP2ZrnkAo&amp;ved=0ahUKEwiM97e5vMGVAxWTALkGHVnNGaIQ4dUDCBA&amp;uact=5&amp;oq=Embalagens+Uberlândia+%28Embalagens+UDI%29+telefone&amp;gs_lp=Egxnd3Mtd2l6LXNlcnAiMEVtYmFsYWdlbnMgVWJlcmzDom5kaWEgKEVtYmFsYWdlbnMgVURJKSB0ZWxlZm9uZTIFEAAY7wUyBRAAGO8FMggQABiABBiiBDIFEAAY7wVI6BZQuwRY7RRwAngBkAEAmAH8AaABvQ6qAQUwLjYuNLgBA8gBAPgBAfgBApgCDKACqRGoAhTCAgoQABhHGNYEGLADwgIHECMY6gIYJ8ICDRAjGJ4GGPAFGOoCGCfCAg0QIxjwBRieBhjqAhgnwgIQEAAYAxiPARjqAhi0AtgBAcICEBAuGAMYjwEY6gIYtALYAQHCAgUQIRifBZgDRvEFzSSA2WuOjRSIBgGQBgi6BgYIARABGAqSBwUyLjUuNaAHjxuyBwUwLjUuNbgHvRDCBwczLTcuNC4xyAeHAoAIAQ&amp;sclient=gws-wiz-serp#" xlink:type="simple">(34) 3214-4232</text:a> </text:p>
          </table:table-cell>
          <table:table-cell table:style-name="ce16" office:value-type="string" calcext:value-type="string">
            <text:p><text:a xlink:href="https://www.google.com/search?q=Embalagens+Uberlândia+%28Embalagens+UDI%29+telefone&amp;sca_esv=d7a897ae2fa4bc83&amp;rlz=1C1PNFE_enBR1221&amp;biw=1366&amp;bih=641&amp;sxsrf=APpeQnsHNcq2dxTKPgbUH4UKB4CXb1geSA%3A1783458446580&amp;ei=jmpNaoz4IpOB5OUP2ZrnkAo&amp;ved=0ahUKEwiM97e5vMGVAxWTALkGHVnNGaIQ4dUDCBA&amp;uact=5&amp;oq=Embalagens+Uberlândia+%28Embalagens+UDI%29+telefone&amp;gs_lp=Egxnd3Mtd2l6LXNlcnAiMEVtYmFsYWdlbnMgVWJlcmzDom5kaWEgKEVtYmFsYWdlbnMgVURJKSB0ZWxlZm9uZTIFEAAY7wUyBRAAGO8FMggQABiABBiiBDIFEAAY7wVI6BZQuwRY7RRwAngBkAEAmAH8AaABvQ6qAQUwLjYuNLgBA8gBAPgBAfgBApgCDKACqRGoAhTCAgoQABhHGNYEGLADwgIHECMY6gIYJ8ICDRAjGJ4GGPAFGOoCGCfCAg0QIxjwBRieBhjqAhgnwgIQEAAYAxiPARjqAhi0AtgBAcICEBAuGAMYjwEY6gIYtALYAQHCAgUQIRifBZgDRvEFzSSA2WuOjRSIBgGQBgi6BgYIARABGAqSBwUyLjUuNaAHjxuyBwUwLjUuNbgHvRDCBwczLTcuNC4xyAeHAoAIAQ&amp;sclient=gws-wiz-serp#" xlink:type="simple">(34) 98700-4973</text:a> </text:p>
          </table:table-cell>
          <table:table-cell/>
          <table:table-cell table:style-name="ce12" table:number-columns-repeated="1636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CJ Selecta</text:p>
          </table:table-cell>
          <table:table-cell office:value-type="string" calcext:value-type="string">
            <text:p>Alimentos e bebidas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Distrito Industrial</text:p>
          </table:table-cell>
          <table:table-cell office:value-type="string" calcext:value-type="string">
            <text:p>Processamento de soja</text:p>
          </table:table-cell>
          <table:table-cell office:value-type="string" calcext:value-type="string">
            <text:p>Peças de desgaste em PEAD p/ transporte de grãos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Cadastro fornecedor + visita PCM</text:p>
          </table:table-cell>
          <table:table-cell office:value-type="string" calcext:value-type="string">
            <text:p>Revestimentos e guias anti-desgaste locais</text:p>
          </table:table-cell>
          <table:table-cell office:value-type="string" calcext:value-type="string">
            <text:p>+55 (34) 2109-7300 </text:p>
          </table:table-cell>
          <table:table-cell table:number-columns-repeated="2"/>
          <table:table-cell table:style-name="ce12" table:number-columns-repeated="1636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Laticínios Porto Alegre (nova fábrica)</text:p>
          </table:table-cell>
          <table:table-cell office:value-type="string" calcext:value-type="string">
            <text:p>Alimentos e bebidas</text:p>
          </table:table-cell>
          <table:table-cell office:value-type="string" calcext:value-type="string">
            <text:p>Patos de Minas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atos de Minas (expansão R$ 200 mi)</text:p>
          </table:table-cell>
          <table:table-cell office:value-type="string" calcext:value-type="string">
            <text:p>Laticínios</text:p>
          </table:table-cell>
          <table:table-cell office:value-type="string" calcext:value-type="string">
            <text:p>Peças p/ novas linhas em instalação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Cadastro fornecedor + visita PCM</text:p>
          </table:table-cell>
          <table:table-cell office:value-type="string" calcext:value-type="string">
            <text:p>Fábrica nova homologando fornecedores</text:p>
          </table:table-cell>
          <table:table-cell office:value-type="string" calcext:value-type="string">
            <text:p>0800 039 1439 </text:p>
          </table:table-cell>
          <table:table-cell table:number-columns-repeated="2"/>
          <table:table-cell table:style-name="ce12" table:number-columns-repeated="1636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JMLI Recuperação de Plástico</text:p>
          </table:table-cell>
          <table:table-cell office:value-type="string" calcext:value-type="string">
            <text:p>Transformação plástica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Uberlândia (enriquecer contato)</text:p>
          </table:table-cell>
          <table:table-cell office:value-type="string" calcext:value-type="string">
            <text:p>Reciclagem de plástico</text:p>
          </table:table-cell>
          <table:table-cell office:value-type="string" calcext:value-type="string">
            <text:p>Peças de reposição de máquinas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E-mail + WhatsApp + visita produção</text:p>
          </table:table-cell>
          <table:table-cell office:value-type="string" calcext:value-type="string">
            <text:p>Nutrição mensal, baixa prioridade</text:p>
          </table:table-cell>
          <table:table-cell office:value-type="string" calcext:value-type="string">
            <text:p> <text:a xlink:href="https://www.google.com/search?q=JMLI+Recuperação+de+Plástico+telefone&amp;sca_esv=d7a897ae2fa4bc83&amp;rlz=1C1PNFE_enBR1221&amp;biw=1366&amp;bih=641&amp;sxsrf=APpeQnv72ycaZ4-Bz5kPjSeoiSwoHfc9GQ%3A1783458530671&amp;ei=4mpNaq7IKOSK5OUPjpvxwQ4&amp;ved=0ahUKEwiuwcThvMGVAxVkBbkGHY5NPOgQ4dUDCBA&amp;uact=5&amp;oq=JMLI+Recuperação+de+Plástico+telefone&amp;gs_lp=Egxnd3Mtd2l6LXNlcnAiKEpNTEkgUmVjdXBlcmHDp8OjbyBkZSBQbMOhc3RpY28gdGVsZWZvbmUyBRAhGKABMgUQIRigATIFECEYoAFIoa0BUABY_KsBcAF4AJABAJgBrAKgAbIRqgEHMC4yLjYuMbgBA8gBAPgBAfgBApgCCqAC0ROoAhTCAgcQIxjqAhgnwgINECMY8AUYngYY6gIYJ8ICEBAAGAMYjwEY6gIYtALYAQHCAhAQLhgDGI8BGOoCGLQC2AEBwgIGEAAYFhgewgICECbCAgUQABjvBcICCBAAGIAEGKIEmAMz8QUQj5eA_P-evLoGBggBEAEYCpIHBzEuMi4zLjSgB4ogsgcHMC4yLjMuNLgHnRPCBwczLTcuMi4xyAe1AYAIAQ&amp;sclient=gws-wiz-serp#" xlink:type="simple">(34) 99127-0156</text:a> </text:p>
          </table:table-cell>
          <table:table-cell table:number-columns-repeated="2"/>
          <table:table-cell table:style-name="ce12" table:number-columns-repeated="1636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murfit Kappa Inpa</text:p>
          </table:table-cell>
          <table:table-cell office:value-type="string" calcext:value-type="string">
            <text:p>Alimentos e bebidas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BR-050, Distrito Industrial 2, Uberaba</text:p>
          </table:table-cell>
          <table:table-cell office:value-type="string" calcext:value-type="string">
            <text:p>Embalagens de papel</text:p>
          </table:table-cell>
          <table:table-cell office:value-type="string" calcext:value-type="string">
            <text:p>Facas, gabaritos e peças de máquina (multinacional — ciclo longo)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Cadastro fornecedor + visita PCM</text:p>
          </table:table-cell>
          <table:table-cell office:value-type="string" calcext:value-type="string">
            <text:p>Reposição de gabaritos com entrega regional</text:p>
          </table:table-cell>
          <table:table-cell office:value-type="string" calcext:value-type="string">
            <text:p>55 34 2104 3100 </text:p>
          </table:table-cell>
          <table:table-cell table:style-name="ce16" office:value-type="string" calcext:value-type="string">
            <text:p>+55 (19) 3707-4000 campinas</text:p>
          </table:table-cell>
          <table:table-cell table:style-name="ce16" office:value-type="string" calcext:value-type="string">
            <text:p>+55 (11) 2105-9000 sao paulo</text:p>
          </table:table-cell>
          <table:table-cell table:style-name="ce12" table:number-columns-repeated="16365"/>
        </table:table-row>
      </table:table>
      <table:table table:name="MODELO DE SCORE" table:style-name="ta1"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9" table:number-columns-repeated="16381"/>
        <table:table-row table:style-name="ro5">
          <table:table-cell table:style-name="ce19" office:value-type="string" calcext:value-type="string">
            <text:p>Modelo de pontuação (0 a 100)</text:p>
          </table:table-cell>
          <table:table-cell table:style-name="Default" table:number-columns-repeated="16383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ce11" office:value-type="string" calcext:value-type="string">
            <text:p>Critério</text:p>
          </table:table-cell>
          <table:table-cell table:style-name="ce11" office:value-type="string" calcext:value-type="string">
            <text:p>Peso</text:p>
          </table:table-cell>
          <table:table-cell table:style-name="ce11" office:value-type="string" calcext:value-type="string">
            <text:p>O que mede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Fit técn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cessidade direta de moldes em alumínio ou usinagem de precisão em PEAD. Injeção e sopro pontuam máximo; manutenção industrial pontua médio.</text:p>
          </table:table-cell>
          <table:table-cell table:style-name="ce12" table:number-columns-repeated="16381"/>
        </table:table-row>
        <table:table-row table:style-name="ro2">
          <table:table-cell office:value-type="string" calcext:value-type="string">
            <text:p>Recorrênci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tencial de compra repetida: peças de desgaste e reparo de moldes geram receita mensal; molde novo é pontual.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Acesso ao decis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ME com dono acessível pontua alto; multinacional com compras corporativas pontua baixo.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Proximidad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berlândia = 15; Uberaba/Araguari = 10; Patos de Minas e demais = 7.</text:p>
          </table:table-cell>
          <table:table-cell table:style-name="ce12" table:number-columns-repeated="16381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ce11" office:value-type="string" calcext:value-type="string">
            <text:p>Classe</text:p>
          </table:table-cell>
          <table:table-cell table:style-name="ce11" office:value-type="string" calcext:value-type="string">
            <text:p>Faixa</text:p>
          </table:table-cell>
          <table:table-cell table:style-name="ce11" office:value-type="string" calcext:value-type="string">
            <text:p>Ação</text:p>
          </table:table-cell>
          <table:table-cell table:style-name="ce11" table:number-columns-repeated="16381"/>
        </table:table-row>
        <table:table-row table:style-name="ro1">
          <table:table-cell table:style-name="ce13" office:value-type="string" calcext:value-type="string">
            <text:p>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Atacar nas semanas 1-2 com visita presencial e amostra usinada.</text:p>
          </table:table-cell>
          <table:table-cell table:style-name="ce12" table:number-columns-repeated="16381"/>
        </table:table-row>
        <table:table-row table:style-name="ro1">
          <table:table-cell table:style-name="ce14" office:value-type="string" calcext:value-type="string">
            <text:p>B</text:p>
          </table:table-cell>
          <table:table-cell office:value-type="string" calcext:value-type="string">
            <text:p>70-84</text:p>
          </table:table-cell>
          <table:table-cell office:value-type="string" calcext:value-type="string">
            <text:p>Semanas 3-6: cadência digital + visita quando houver resposta.</text:p>
          </table:table-cell>
          <table:table-cell table:style-name="ce12" table:number-columns-repeated="16381"/>
        </table:table-row>
        <table:table-row table:style-name="ro1">
          <table:table-cell table:style-name="ce15" office:value-type="string" calcext:value-type="string">
            <text:p>C</text:p>
          </table:table-cell>
          <table:table-cell office:value-type="string" calcext:value-type="string">
            <text:p>55-69</text:p>
          </table:table-cell>
          <table:table-cell office:value-type="string" calcext:value-type="string">
            <text:p>Nutrição mensal (e-mail com casos) e cadastro de fornecedor nas grandes.</text:p>
          </table:table-cell>
          <table:table-cell table:style-name="ce12" table:number-columns-repeated="16381"/>
        </table:table-row>
      </table:table>
      <table:table table:name="PLAYBOOK" table:style-name="ta1">
        <table:table-column table:style-name="co23" table:default-cell-style-name="ce12"/>
        <table:table-column table:style-name="co24" table:default-cell-style-name="ce12"/>
        <table:table-column table:style-name="co19" table:number-columns-repeated="16382"/>
        <table:table-row table:style-name="ro5">
          <table:table-cell table:style-name="ce19" office:value-type="string" calcext:value-type="string">
            <text:p>Playbook de prospecção por modelo</text:p>
          </table:table-cell>
          <table:table-cell table:style-name="Default" table:number-columns-repeated="16383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ce11" office:value-type="string" calcext:value-type="string">
            <text:p>Modelo</text:p>
          </table:table-cell>
          <table:table-cell table:style-name="ce11" office:value-type="string" calcext:value-type="string">
            <text:p>Como executar</text:p>
          </table:table-cell>
          <table:table-cell table:style-name="ce11" table:number-columns-repeated="16382"/>
        </table:table-row>
        <table:table-row table:style-name="ro3">
          <table:table-cell office:value-type="string" calcext:value-type="string">
            <text:p>Visita técnica + amostra usinada</text:p>
          </table:table-cell>
          <table:table-cell office:value-type="string" calcext:value-type="string">
            <text:p>Para transformadores de plástico, borracha e utilidades. Leve uma peça de demonstração (postiço de molde ou peça em PEAD). Peça pelo responsável de ferramentaria/PCP. Oferta-isca: orçamento gratuito de reparo de um molde problemático. Maioria está no Distrito Industrial — dá para visitar 5-6 por dia.</text:p>
          </table:table-cell>
          <table:table-cell table:style-name="ce12" table:number-columns-repeated="16382"/>
        </table:table-row>
        <table:table-row table:style-name="ro2">
          <table:table-cell office:value-type="string" calcext:value-type="string">
            <text:p>E-mail + WhatsApp + visita produção</text:p>
          </table:table-cell>
          <table:table-cell office:value-type="string" calcext:value-type="string">
            <text:p>Para cosméticos e químicos. D1: e-mail curto com foto de peça de envase (estrela/guia). D3: WhatsApp ao responsável de produção. D7: ligação. D14: caso de sucesso. O comprador aqui não sabe que existe usinagem local — eduque com imagens.</text:p>
          </table:table-cell>
          <table:table-cell table:style-name="ce12" table:number-columns-repeated="16382"/>
        </table:table-row>
        <table:table-row table:style-name="ro2">
          <table:table-cell office:value-type="string" calcext:value-type="string">
            <text:p>Cadastro fornecedor + visita PCM</text:p>
          </table:table-cell>
          <table:table-cell office:value-type="string" calcext:value-type="string">
            <text:p>Para alimentos/bebidas. Cadastre-se no portal de fornecedores, depois visite a manutenção (PCM) com catálogo de peças em PEAD/PEUHMW alimentício. Argumento: entrega em 48h reduz estoque parado. Ciclo mais longo, ticket recorrente.</text:p>
          </table:table-cell>
          <table:table-cell table:style-name="ce12" table:number-columns-repeated="16382"/>
        </table:table-row>
        <table:table-row table:style-name="ro1">
          <table:table-cell office:value-type="string" calcext:value-type="string">
            <text:p>Parceria de capacidade (overflow)</text:p>
          </table:table-cell>
          <table:table-cell office:value-type="string" calcext:value-type="string">
            <text:p>Para metalmecânicas: ofereça absorver picos de usinagem deles. Vira receita e vitrine.</text:p>
          </table:table-cell>
          <table:table-cell table:style-name="ce12" table:number-columns-repeated="16382"/>
        </table:table-row>
        <table:table-row table:style-name="ro2">
          <table:table-cell office:value-type="string" calcext:value-type="string">
            <text:p>Parceria de indicação</text:p>
          </table:table-cell>
          <table:table-cell office:value-type="string" calcext:value-type="string">
            <text:p>Para prototipagem 3D e distribuidores de embalagem: comissão por indicação de cliente que precise de molde. Custo de aquisição quase zero.</text:p>
          </table:table-cell>
          <table:table-cell table:style-name="ce12" table:number-columns-repeated="16382"/>
        </table:table-row>
        <table:table-row table:style-name="ro1">
          <table:table-cell table:style-name="Default" table:number-columns-repeated="16384"/>
        </table:table-row>
        <table:table-row table:style-name="ro6">
          <table:table-cell table:style-name="ce30" office:value-type="string" calcext:value-type="string">
            <text:p>Cadência sugerida (visão geral)</text:p>
          </table:table-cell>
          <table:table-cell table:style-name="ce30" table:number-columns-repeated="16383"/>
        </table:table-row>
        <table:table-row table:style-name="ro1">
          <table:table-cell office:value-type="string" calcext:value-type="string">
            <text:p>Semanas 1-2</text:p>
          </table:table-cell>
          <table:table-cell office:value-type="string" calcext:value-type="string">
            <text:p>7 leads Classe A: visita presencial. Meta: 4 reuniões.</text:p>
          </table:table-cell>
          <table:table-cell table:style-name="ce12" table:number-columns-repeated="16382"/>
        </table:table-row>
        <table:table-row table:style-name="ro1">
          <table:table-cell office:value-type="string" calcext:value-type="string">
            <text:p>Semanas 3-6</text:p>
          </table:table-cell>
          <table:table-cell office:value-type="string" calcext:value-type="string">
            <text:p>27 leads Classe B: cadência digital (D1 e-mail, D3 WhatsApp, D7 ligação, D14 follow-up). Meta: 8 reuniões.</text:p>
          </table:table-cell>
          <table:table-cell table:style-name="ce12" table:number-columns-repeated="16382"/>
        </table:table-row>
        <table:table-row table:style-name="ro1">
          <table:table-cell office:value-type="string" calcext:value-type="string">
            <text:p>Mensal</text:p>
          </table:table-cell>
          <table:table-cell office:value-type="string" calcext:value-type="string">
            <text:p>11 leads Classe C: e-mail de nutrição com caso de sucesso + cadastros de fornecedor nas grandes.</text:p>
          </table:table-cell>
          <table:table-cell table:style-name="ce12" table:number-columns-repeated="16382"/>
        </table:table-row>
      </table:table>
      <table:table table:name="RESUMO" table:style-name="ta1">
        <table:table-column table:style-name="co20" table:default-cell-style-name="Default"/>
        <table:table-column table:style-name="co25" table:default-cell-style-name="Default"/>
        <table:table-column table:style-name="co25"/>
        <table:table-column table:style-name="co19" table:number-columns-repeated="16381"/>
        <table:table-row table:style-name="ro5">
          <table:table-cell table:style-name="ce19" office:value-type="string" calcext:value-type="string">
            <text:p>Resumo do mailing — 45 leads</text:p>
          </table:table-cell>
          <table:table-cell/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table:style-name="ce11" office:value-type="string" calcext:value-type="string">
            <text:p>Segmento</text:p>
          </table:table-cell>
          <table:table-cell table:style-name="ce11" office:value-type="string" calcext:value-type="string">
            <text:p>Leads</text:p>
          </table:table-cell>
          <table:table-cell table:style-name="ce11" table:number-columns-repeated="16382"/>
        </table:table-row>
        <table:table-row table:style-name="ro1">
          <table:table-cell office:value-type="string" calcext:value-type="string">
            <text:p>Transformação plástica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Alimentos e bebidas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osméticos e higiene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Química e saneantes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Utilidades domésticas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Metalmecânica e agro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Borracha e EV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Prototipagem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anal indiret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table:style-name="ce11" office:value-type="string" calcext:value-type="string">
            <text:p>Classe</text:p>
          </table:table-cell>
          <table:table-cell table:style-name="ce11" office:value-type="string" calcext:value-type="string">
            <text:p>Leads</text:p>
          </table:table-cell>
          <table:table-cell table:style-name="ce11" table:number-columns-repeated="16382"/>
        </table:table-row>
        <table:table-row table:style-name="ro1">
          <table:table-cell table:style-name="ce13" office:value-type="string" calcext:value-type="string">
            <text:p>A (85+)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82"/>
        </table:table-row>
        <table:table-row table:style-name="ro1">
          <table:table-cell table:style-name="ce14" office:value-type="string" calcext:value-type="string">
            <text:p>B (70-84)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82"/>
        </table:table-row>
        <table:table-row table:style-name="ro1">
          <table:table-cell table:style-name="ce15" office:value-type="string" calcext:value-type="string">
            <text:p>C (55-69)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table:style-name="ce11" office:value-type="string" calcext:value-type="string">
            <text:p>Cidade</text:p>
          </table:table-cell>
          <table:table-cell table:style-name="ce11" office:value-type="string" calcext:value-type="string">
            <text:p>Leads</text:p>
          </table:table-cell>
          <table:table-cell table:style-name="ce11" table:number-columns-repeated="16382"/>
        </table:table-row>
        <table:table-row table:style-name="ro1">
          <table:table-cell office:value-type="string" calcext:value-type="string">
            <text:p>Uberlândia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Uberaba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Patos de Minas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MG (confirmar)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7">
          <table:table-cell table:style-name="ce12" office:value-type="string" calcext:value-type="string">
            <text:p>Nota: CNPJs e endereços marcados com traço devem ser enriquecidos (Econodata/cnpj.biz gratuitos). Dados coletados de fontes públicas em 07/07/2026.</text:p>
          </table:table-cell>
          <table:table-cell table:style-name="ce12" table:number-columns-repeated="16383"/>
        </table:table-row>
      </table:table>
      <table:named-expressions/>
      <table:database-ranges>
        <table:database-range table:name="__Anonymous_Sheet_DB__0" table:target-range-address="LEADS.A1:LEADS.P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3">00/00/0000</text:date>, <text:time style:data-style-name="N2" text:time-value="09:36:41.047690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7-08T17:34:34.100140100</dc:date>
    <meta:editing-duration>PT2H59M14S</meta:editing-duration>
    <meta:editing-cycles>3</meta:editing-cycles>
    <meta:document-statistic meta:table-count="4" meta:cell-count="892" meta:object-count="0"/>
  </office:meta>
</office:document-meta>
</file>